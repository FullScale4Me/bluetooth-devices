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6000000644B8E0875.png" manifest:media-type="image/png"/>
  <manifest:file-entry manifest:full-path="Pictures/1000000100000296000000DEF233D1FB.png" manifest:media-type="image/png"/>
  <manifest:file-entry manifest:full-path="Pictures/10000000000001B3000000CDFB5492B8.png" manifest:media-type="image/png"/>
  <manifest:file-entry manifest:full-path="Pictures/10000001000001F400000164B8B271B9.png" manifest:media-type="image/png"/>
  <manifest:file-entry manifest:full-path="Pictures/10000000000001540000008D09F0A259.png" manifest:media-type="image/png"/>
  <manifest:file-entry manifest:full-path="Pictures/100000000000029100000196A7477841.jpg" manifest:media-type="image/jpeg"/>
  <manifest:file-entry manifest:full-path="Pictures/1000000000000048000000205EC1FEF7.jpg" manifest:media-type="image/jpeg"/>
  <manifest:file-entry manifest:full-path="Pictures/10000000000001F4000001680F49C75C.png" manifest:media-type="image/png"/>
  <manifest:file-entry manifest:full-path="Pictures/10000000000002FF00000191343C876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itle">
      <style:paragraph-properties fo:margin-top="0in" fo:margin-bottom="0in" style:contextual-spacing="false"/>
      <style:text-properties fo:font-size="26pt" style:font-size-asian="26pt" style:font-size-complex="26pt"/>
    </style:style>
    <style:style style:name="P2" style:family="paragraph" style:parent-style-name="Text_20_body">
      <style:paragraph-properties fo:text-align="left" style:justify-single-word="false"/>
      <style:text-properties fo:font-size="6pt" style:font-size-asian="5.25pt" style:font-size-complex="6pt"/>
    </style:style>
    <style:style style:name="P3" style:family="paragraph" style:parent-style-name="Text_20_body">
      <style:text-properties officeooo:paragraph-rsid="00c1b755"/>
    </style:style>
    <style:style style:name="P4" style:family="paragraph" style:parent-style-name="Text_20_body">
      <style:paragraph-properties fo:margin-top="0in" fo:margin-bottom="0.0598in" style:contextual-spacing="false"/>
      <style:text-properties officeooo:paragraph-rsid="00c1b755"/>
    </style:style>
    <style:style style:name="P5" style:family="paragraph" style:parent-style-name="Text_20_body">
      <style:paragraph-properties fo:margin-top="0in" fo:margin-bottom="0in" style:contextual-spacing="false" fo:line-height="100%"/>
      <style:text-properties officeooo:paragraph-rsid="0106b376"/>
    </style:style>
    <style:style style:name="P6" style:family="paragraph" style:parent-style-name="Text_20_body">
      <style:paragraph-properties fo:margin-top="0in" fo:margin-bottom="0.1in" style:contextual-spacing="false" fo:line-height="100%"/>
      <style:text-properties officeooo:paragraph-rsid="0106b376"/>
    </style:style>
    <style:style style:name="P7" style:family="paragraph" style:parent-style-name="Text_20_body">
      <style:text-properties officeooo:paragraph-rsid="00764019"/>
    </style:style>
    <style:style style:name="P8" style:family="paragraph" style:parent-style-name="Text_20_body">
      <style:text-properties officeooo:paragraph-rsid="00b21a27"/>
    </style:style>
    <style:style style:name="P9" style:family="paragraph" style:parent-style-name="Text_20_body" style:list-style-name="L1">
      <style:paragraph-properties fo:margin-top="0in" fo:margin-bottom="0in" style:contextual-spacing="false"/>
      <style:text-properties officeooo:paragraph-rsid="005f3cd2"/>
    </style:style>
    <style:style style:name="P10" style:family="paragraph" style:parent-style-name="Text_20_body">
      <style:paragraph-properties fo:margin-top="0in" fo:margin-bottom="0in" style:contextual-spacing="false"/>
      <style:text-properties fo:font-size="6pt" officeooo:paragraph-rsid="0047151f" style:font-size-asian="5.25pt" style:font-size-complex="6pt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47151f"/>
    </style:style>
    <style:style style:name="P12" style:family="paragraph" style:parent-style-name="Text_20_body">
      <style:paragraph-properties fo:margin-left="0in" fo:margin-top="0in" fo:margin-bottom="0in" style:contextual-spacing="false" fo:text-indent="0in" style:auto-text-indent="false">
        <style:tab-stops/>
      </style:paragraph-properties>
      <style:text-properties officeooo:paragraph-rsid="00a85ef5"/>
    </style:style>
    <style:style style:name="P13" style:family="paragraph" style:parent-style-name="Text_20_body" style:list-style-name="L2">
      <style:paragraph-properties fo:margin-top="0in" fo:margin-bottom="0in" style:contextual-spacing="false" fo:line-height="150%"/>
      <style:text-properties officeooo:paragraph-rsid="00761d79"/>
    </style:style>
    <style:style style:name="P14" style:family="paragraph" style:parent-style-name="Text_20_body" style:list-style-name="L2">
      <style:paragraph-properties fo:margin-top="0in" fo:margin-bottom="0in" style:contextual-spacing="false" fo:line-height="150%"/>
      <style:text-properties officeooo:paragraph-rsid="007c4fb6"/>
    </style:style>
    <style:style style:name="P15" style:family="paragraph" style:parent-style-name="Text_20_body" style:list-style-name="L2">
      <style:paragraph-properties fo:margin-top="0in" fo:margin-bottom="0in" style:contextual-spacing="false" fo:line-height="150%"/>
      <style:text-properties officeooo:paragraph-rsid="00ccd8d4"/>
    </style:style>
    <style:style style:name="P16" style:family="paragraph" style:parent-style-name="Text_20_body" style:list-style-name="L2">
      <style:paragraph-properties fo:margin-top="0in" fo:margin-bottom="0in" style:contextual-spacing="false" fo:line-height="150%"/>
      <style:text-properties officeooo:paragraph-rsid="00de7c27"/>
    </style:style>
    <style:style style:name="P17" style:family="paragraph" style:parent-style-name="Text_20_body">
      <style:paragraph-properties fo:margin-top="0in" fo:margin-bottom="0in" style:contextual-spacing="false" fo:line-height="100%"/>
      <style:text-properties officeooo:paragraph-rsid="00ccd8d4"/>
    </style:style>
    <style:style style:name="P18" style:family="paragraph" style:parent-style-name="Heading_20_4">
      <style:paragraph-properties fo:margin-top="0.1598in" fo:margin-bottom="0.0799in" style:contextual-spacing="false"/>
    </style:style>
    <style:style style:name="P19" style:family="paragraph" style:parent-style-name="Text_20_body">
      <style:paragraph-properties fo:margin-top="0.0398in" fo:margin-bottom="0.0398in" style:contextual-spacing="false"/>
      <style:text-properties officeooo:paragraph-rsid="005da72b"/>
    </style:style>
    <style:style style:name="P20" style:family="paragraph" style:parent-style-name="Text_20_body">
      <style:paragraph-properties fo:margin-top="0.0398in" fo:margin-bottom="0.0398in" style:contextual-spacing="false"/>
      <style:text-properties officeooo:paragraph-rsid="006acd40"/>
    </style:style>
    <style:style style:name="P21" style:family="paragraph" style:parent-style-name="Text_20_body">
      <style:paragraph-properties fo:margin-left="0in" fo:margin-top="0.0398in" fo:margin-bottom="0.0398in" style:contextual-spacing="false" fo:text-indent="0in" style:auto-text-indent="false"/>
      <style:text-properties officeooo:paragraph-rsid="006acd40"/>
    </style:style>
    <style:style style:name="P22" style:family="paragraph" style:parent-style-name="Text_20_body">
      <style:paragraph-properties fo:margin-top="0.0398in" fo:margin-bottom="0.0398in" style:contextual-spacing="false"/>
      <style:text-properties officeooo:paragraph-rsid="00d74f6a"/>
    </style:style>
    <style:style style:name="P23" style:family="paragraph" style:parent-style-name="Text_20_body">
      <style:paragraph-properties fo:margin-top="0in" fo:margin-bottom="0.0598in" style:contextual-spacing="false"/>
      <style:text-properties officeooo:paragraph-rsid="009272de"/>
    </style:style>
    <style:style style:name="P24" style:family="paragraph" style:parent-style-name="Text_20_body">
      <style:paragraph-properties fo:margin-top="0in" fo:margin-bottom="0in" style:contextual-spacing="false"/>
      <style:text-properties officeooo:paragraph-rsid="009272de"/>
    </style:style>
    <style:style style:name="P25" style:family="paragraph" style:parent-style-name="Text_20_body">
      <style:paragraph-properties fo:margin-top="0in" fo:margin-bottom="0in" style:contextual-spacing="false"/>
      <style:text-properties officeooo:paragraph-rsid="003333dc"/>
    </style:style>
    <style:style style:name="P26" style:family="paragraph" style:parent-style-name="Text_20_body" style:list-style-name="L2">
      <style:paragraph-properties fo:margin-top="0in" fo:margin-bottom="0in" style:contextual-spacing="false" fo:line-height="150%"/>
      <style:text-properties officeooo:paragraph-rsid="0047151f"/>
    </style:style>
    <style:style style:name="P27" style:family="paragraph" style:parent-style-name="Text_20_body" style:list-style-name="L2">
      <style:paragraph-properties fo:margin-top="0in" fo:margin-bottom="0in" style:contextual-spacing="false" fo:line-height="150%"/>
      <style:text-properties officeooo:rsid="00b77de3" officeooo:paragraph-rsid="00b77de3"/>
    </style:style>
    <style:style style:name="P28" style:family="paragraph" style:parent-style-name="Text_20_body" style:list-style-name="L2">
      <style:paragraph-properties fo:margin-top="0in" fo:margin-bottom="0in" style:contextual-spacing="false" fo:line-height="150%"/>
      <style:text-properties officeooo:paragraph-rsid="003333dc"/>
    </style:style>
    <style:style style:name="P29" style:family="paragraph" style:parent-style-name="Text_20_body" style:list-style-name="L2">
      <style:paragraph-properties fo:margin-top="0in" fo:margin-bottom="0in" style:contextual-spacing="false" fo:line-height="150%"/>
      <style:text-properties officeooo:paragraph-rsid="00349736"/>
    </style:style>
    <style:style style:name="P30" style:family="paragraph" style:parent-style-name="Text_20_body">
      <style:paragraph-properties fo:margin-top="0.0598in" fo:margin-bottom="0in" style:contextual-spacing="false"/>
      <style:text-properties officeooo:paragraph-rsid="00bde73f"/>
    </style:style>
    <style:style style:name="P31" style:family="paragraph" style:parent-style-name="Text_20_body">
      <style:paragraph-properties fo:margin-top="0in" fo:margin-bottom="0in" style:contextual-spacing="false"/>
      <style:text-properties officeooo:paragraph-rsid="00bde73f"/>
    </style:style>
    <style:style style:name="P32" style:family="paragraph" style:parent-style-name="Text_20_body">
      <style:paragraph-properties fo:margin-top="0in" fo:margin-bottom="0in" style:contextual-spacing="false"/>
      <style:text-properties officeooo:paragraph-rsid="0056d4b8"/>
    </style:style>
    <style:style style:name="P33" style:family="paragraph" style:parent-style-name="Text_20_body">
      <style:paragraph-properties fo:margin-top="0in" fo:margin-bottom="0in" style:contextual-spacing="false"/>
      <style:text-properties officeooo:paragraph-rsid="00349736"/>
    </style:style>
    <style:style style:name="P34" style:family="paragraph" style:parent-style-name="Text_20_body">
      <style:paragraph-properties fo:margin-left="0in" fo:margin-top="0in" fo:margin-bottom="0in" style:contextual-spacing="false" fo:text-indent="0in" style:auto-text-indent="false">
        <style:tab-stops/>
      </style:paragraph-properties>
      <style:text-properties officeooo:paragraph-rsid="0035b83b"/>
    </style:style>
    <style:style style:name="P35" style:family="paragraph" style:parent-style-name="Text_20_body">
      <style:paragraph-properties fo:margin-left="0.4925in" fo:margin-top="0in" fo:margin-bottom="0in" style:contextual-spacing="false" fo:text-indent="-0.4201in" style:auto-text-indent="false">
        <style:tab-stops/>
      </style:paragraph-properties>
      <style:text-properties officeooo:paragraph-rsid="0035b83b"/>
    </style:style>
    <style:style style:name="P36" style:family="paragraph" style:parent-style-name="Text_20_body">
      <style:paragraph-properties fo:margin-top="0in" fo:margin-bottom="0in" style:contextual-spacing="false"/>
      <style:text-properties officeooo:paragraph-rsid="0094b094"/>
    </style:style>
    <style:style style:name="P37" style:family="paragraph" style:parent-style-name="Standard">
      <style:text-properties fo:font-weight="bold" officeooo:rsid="00b78fb1" officeooo:paragraph-rsid="00b78fb1" style:font-weight-asian="bold" style:font-weight-complex="bold"/>
    </style:style>
    <style:style style:name="P38" style:family="paragraph" style:parent-style-name="Standard">
      <style:text-properties fo:font-size="6pt" officeooo:rsid="00b78fb1" officeooo:paragraph-rsid="00b78fb1" style:font-size-asian="5.25pt" style:font-size-complex="6pt"/>
    </style:style>
    <style:style style:name="P39" style:family="paragraph" style:parent-style-name="Standard">
      <style:text-properties officeooo:rsid="00b78fb1" officeooo:paragraph-rsid="00bc6100"/>
    </style:style>
    <style:style style:name="P40" style:family="paragraph" style:parent-style-name="Standard">
      <style:text-properties fo:font-size="6pt" officeooo:rsid="00b78fb1" officeooo:paragraph-rsid="00bc6100" style:font-size-asian="5.25pt" style:font-size-complex="6pt"/>
    </style:style>
    <style:style style:name="P41" style:family="paragraph" style:parent-style-name="Standard">
      <style:paragraph-properties fo:break-before="page"/>
      <style:text-properties officeooo:rsid="00b78fb1" officeooo:paragraph-rsid="00bc6100"/>
    </style:style>
    <style:style style:name="P42" style:family="paragraph" style:parent-style-name="Standard">
      <style:text-properties officeooo:paragraph-rsid="00b78fb1"/>
    </style:style>
    <style:style style:name="P43" style:family="paragraph" style:parent-style-name="Standard">
      <style:text-properties fo:font-size="6pt" officeooo:rsid="00eafd47" officeooo:paragraph-rsid="00eafd47" style:font-size-asian="5.25pt" style:font-size-complex="6pt"/>
    </style:style>
    <style:style style:name="P44" style:family="paragraph" style:parent-style-name="Standard">
      <style:paragraph-properties fo:margin-top="0in" fo:margin-bottom="0.1in" style:contextual-spacing="false"/>
      <style:text-properties officeooo:rsid="00eafd47" officeooo:paragraph-rsid="00eafd47"/>
    </style:style>
    <style:style style:name="P45" style:family="paragraph" style:parent-style-name="Standard">
      <style:text-properties fo:font-size="6pt" officeooo:paragraph-rsid="00b78fb1" style:font-size-asian="5.25pt" style:font-size-complex="6pt"/>
    </style:style>
    <style:style style:name="P46" style:family="paragraph" style:parent-style-name="Standard">
      <style:text-properties fo:font-size="12pt" officeooo:paragraph-rsid="00b78fb1" style:font-size-asian="10.5pt" style:font-size-complex="12pt"/>
    </style:style>
    <style:style style:name="P47" style:family="paragraph" style:parent-style-name="Heading_20_4">
      <style:paragraph-properties fo:margin-top="0in" fo:margin-bottom="0in" style:contextual-spacing="false"/>
    </style:style>
    <style:style style:name="P48" style:family="paragraph" style:parent-style-name="Text_20_body">
      <style:paragraph-properties fo:margin-top="0in" fo:margin-bottom="0in" style:contextual-spacing="false"/>
      <style:text-properties officeooo:paragraph-rsid="00b78fb1"/>
    </style:style>
    <style:style style:name="P49" style:family="paragraph" style:parent-style-name="Text_20_body">
      <style:paragraph-properties fo:margin-top="0in" fo:margin-bottom="0.1in" style:contextual-spacing="false"/>
      <style:text-properties officeooo:paragraph-rsid="00b78fb1" loext:padding="0in" loext:border="none"/>
    </style:style>
    <style:style style:name="P50" style:family="paragraph" style:parent-style-name="Text_20_body">
      <style:paragraph-properties fo:margin-top="0in" fo:margin-bottom="0.1in" style:contextual-spacing="false"/>
      <style:text-properties fo:font-weight="bold" officeooo:paragraph-rsid="00b78fb1" style:font-weight-asian="bold" style:font-weight-complex="bold" loext:padding="0in" loext:border="none"/>
    </style:style>
    <style:style style:name="P51" style:family="paragraph" style:parent-style-name="Text_20_body" style:list-style-name="L3">
      <style:paragraph-properties fo:margin-top="0in" fo:margin-bottom="0.1in" style:contextual-spacing="false"/>
      <style:text-properties officeooo:paragraph-rsid="00c1a8be"/>
    </style:style>
    <style:style style:name="P52" style:family="paragraph" style:parent-style-name="Text_20_body" style:list-style-name="L3">
      <style:paragraph-properties fo:margin-top="0in" fo:margin-bottom="0.1in" style:contextual-spacing="false"/>
      <style:text-properties officeooo:paragraph-rsid="00c1a8be" loext:padding="0in" loext:border="none"/>
    </style:style>
    <style:style style:name="P53" style:family="paragraph" style:parent-style-name="Text_20_body">
      <style:paragraph-properties fo:margin-top="0in" fo:margin-bottom="0in" style:contextual-spacing="false"/>
      <style:text-properties fo:font-size="6pt" officeooo:paragraph-rsid="00b78fb1" style:font-size-asian="5.25pt" style:font-size-complex="6pt" loext:padding="0in" loext:border="none"/>
    </style:style>
    <style:style style:name="P54" style:family="paragraph" style:parent-style-name="Text_20_body">
      <style:text-properties officeooo:paragraph-rsid="0080fcf2"/>
    </style:style>
    <style:style style:name="P55" style:family="paragraph" style:parent-style-name="Text_20_body">
      <style:text-properties fo:font-size="6pt" officeooo:paragraph-rsid="0080fcf2" style:font-size-asian="5.25pt" style:font-size-complex="6pt"/>
    </style:style>
    <style:style style:name="P56" style:family="paragraph" style:parent-style-name="Standard">
      <style:paragraph-properties fo:margin-top="0in" fo:margin-bottom="0in" style:contextual-spacing="false" fo:line-height="100%"/>
      <style:text-properties officeooo:paragraph-rsid="00ea0a60"/>
    </style:style>
    <style:style style:name="P57" style:family="paragraph" style:parent-style-name="Standard">
      <style:paragraph-properties fo:margin-top="0in" fo:margin-bottom="0in" style:contextual-spacing="false" fo:line-height="100%"/>
      <style:text-properties officeooo:rsid="00fd506c" officeooo:paragraph-rsid="00fd506c"/>
    </style:style>
    <style:style style:name="P58" style:family="paragraph" style:parent-style-name="Standard">
      <style:paragraph-properties fo:margin-top="0in" fo:margin-bottom="0in" style:contextual-spacing="false" fo:line-height="100%"/>
      <style:text-properties officeooo:paragraph-rsid="00faf332"/>
    </style:style>
    <style:style style:name="P59" style:family="paragraph" style:parent-style-name="Standard">
      <style:paragraph-properties fo:margin-top="0in" fo:margin-bottom="0in" style:contextual-spacing="false" fo:line-height="100%"/>
      <style:text-properties fo:font-size="6pt" officeooo:paragraph-rsid="00faf332" style:font-size-asian="5.25pt" style:font-size-complex="6pt"/>
    </style:style>
    <style:style style:name="P6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faf332"/>
    </style:style>
    <style:style style:name="P61" style:family="paragraph" style:parent-style-name="Text_20_body">
      <style:paragraph-properties fo:margin-top="0in" fo:margin-bottom="0in" style:contextual-spacing="false" fo:line-height="100%"/>
      <style:text-properties officeooo:paragraph-rsid="00424b44"/>
    </style:style>
    <style:style style:name="P62" style:family="paragraph" style:parent-style-name="Text_20_body">
      <style:paragraph-properties fo:margin-top="0in" fo:margin-bottom="0in" style:contextual-spacing="false" fo:line-height="100%"/>
      <style:text-properties fo:font-size="6pt" officeooo:paragraph-rsid="00166ee6" style:font-size-asian="5.25pt" style:font-size-complex="6pt"/>
    </style:style>
    <style:style style:name="P63" style:family="paragraph" style:parent-style-name="Text_20_body" style:list-style-name="L4">
      <style:text-properties officeooo:paragraph-rsid="00166ee6"/>
    </style:style>
    <style:style style:name="P64" style:family="paragraph" style:parent-style-name="Text_20_body" style:list-style-name="L5">
      <style:text-properties officeooo:paragraph-rsid="00166ee6"/>
    </style:style>
    <style:style style:name="P65" style:family="paragraph" style:parent-style-name="Text_20_body">
      <style:text-properties officeooo:paragraph-rsid="00166ee6"/>
    </style:style>
    <style:style style:name="P66" style:family="paragraph" style:parent-style-name="Text_20_body" style:list-style-name="L6">
      <style:text-properties officeooo:paragraph-rsid="00166ee6"/>
    </style:style>
    <style:style style:name="P67" style:family="paragraph" style:parent-style-name="Text_20_body" style:list-style-name="L7">
      <style:text-properties officeooo:paragraph-rsid="00166ee6"/>
    </style:style>
    <style:style style:name="P68" style:family="paragraph" style:parent-style-name="Text_20_body">
      <style:text-properties officeooo:paragraph-rsid="008909c2"/>
    </style:style>
    <style:style style:name="P69" style:family="paragraph" style:parent-style-name="Text_20_body">
      <style:paragraph-properties fo:margin-left="0.3701in" fo:margin-top="0in" fo:margin-bottom="0.0402in" style:contextual-spacing="false" fo:line-height="100%" fo:text-indent="0in" style:auto-text-indent="false"/>
      <style:text-properties officeooo:paragraph-rsid="008909c2"/>
    </style:style>
    <style:style style:name="P70" style:family="paragraph" style:parent-style-name="Text_20_body">
      <style:paragraph-properties fo:margin-left="0.3701in" fo:margin-top="0in" fo:margin-bottom="0.0402in" style:contextual-spacing="false" fo:line-height="100%" fo:text-indent="0in" style:auto-text-indent="false"/>
      <style:text-properties officeooo:paragraph-rsid="00f73f5c"/>
    </style:style>
    <style:style style:name="P71" style:family="paragraph" style:parent-style-name="Text_20_body">
      <style:paragraph-properties fo:margin-top="0in" fo:margin-bottom="0in" style:contextual-spacing="false" fo:line-height="100%"/>
      <style:text-properties officeooo:paragraph-rsid="008909c2"/>
    </style:style>
    <style:style style:name="P72" style:family="paragraph" style:parent-style-name="Text_20_body">
      <style:paragraph-properties fo:text-indent="0.2598in" style:auto-text-indent="false"/>
      <style:text-properties officeooo:paragraph-rsid="00f73f5c"/>
    </style:style>
    <style:style style:name="P73" style:family="paragraph" style:parent-style-name="Text_20_body" style:list-style-name="L8">
      <style:text-properties officeooo:paragraph-rsid="00f73f5c"/>
    </style:style>
    <style:style style:name="P74" style:family="paragraph" style:parent-style-name="Text_20_body">
      <style:paragraph-properties fo:margin-top="0in" fo:margin-bottom="0in" style:contextual-spacing="false"/>
      <style:text-properties officeooo:paragraph-rsid="00f73f5c"/>
    </style:style>
    <style:style style:name="P75" style:family="paragraph" style:parent-style-name="Standard">
      <style:text-properties officeooo:paragraph-rsid="001943e9"/>
    </style:style>
    <style:style style:name="P76" style:family="paragraph" style:parent-style-name="Standard">
      <style:text-properties fo:font-size="6pt" officeooo:rsid="000c10bf" officeooo:paragraph-rsid="001943e9" style:font-size-asian="5.25pt" style:font-size-complex="6pt"/>
    </style:style>
    <style:style style:name="P77" style:family="paragraph" style:parent-style-name="Standard">
      <style:text-properties officeooo:paragraph-rsid="00e5ce18"/>
    </style:style>
    <style:style style:name="P78" style:family="paragraph" style:parent-style-name="Standard">
      <style:text-properties fo:font-size="6pt" officeooo:paragraph-rsid="00e5ce18" style:font-size-asian="5.25pt" style:font-size-complex="6pt"/>
    </style:style>
    <style:style style:name="P79" style:family="paragraph" style:parent-style-name="Standard">
      <style:text-properties fo:font-size="6pt" officeooo:rsid="000c10bf" officeooo:paragraph-rsid="0073b26a" style:font-size-asian="5.25pt" style:font-size-complex="6pt"/>
    </style:style>
    <style:style style:name="P80" style:family="paragraph" style:parent-style-name="Standard">
      <style:text-properties officeooo:rsid="000c10bf" officeooo:paragraph-rsid="0073b26a"/>
    </style:style>
    <style:style style:name="P81" style:family="paragraph" style:parent-style-name="Standard">
      <style:text-properties fo:font-size="12pt" officeooo:rsid="000c10bf" officeooo:paragraph-rsid="00424b44" style:font-size-asian="10.5pt" style:font-size-complex="12pt"/>
    </style:style>
    <style:style style:name="P82" style:family="paragraph" style:parent-style-name="Standard">
      <style:paragraph-properties fo:line-height="100%"/>
      <style:text-properties officeooo:paragraph-rsid="00ff797d"/>
    </style:style>
    <style:style style:name="P83" style:family="paragraph" style:parent-style-name="Standard">
      <style:paragraph-properties fo:line-height="150%">
        <style:tab-stops/>
      </style:paragraph-properties>
      <style:text-properties fo:font-size="6pt" officeooo:rsid="0042f2e5" officeooo:paragraph-rsid="0096d11e" style:font-size-asian="5.25pt" style:font-size-complex="6pt"/>
    </style:style>
    <style:style style:name="P84" style:family="paragraph" style:parent-style-name="Standard">
      <style:paragraph-properties fo:line-height="150%">
        <style:tab-stops/>
      </style:paragraph-properties>
      <style:text-properties fo:font-weight="bold" officeooo:rsid="0042f2e5" officeooo:paragraph-rsid="0096d11e" style:font-weight-asian="bold" style:font-weight-complex="bold"/>
    </style:style>
    <style:style style:name="P85" style:family="paragraph" style:parent-style-name="Standard">
      <style:paragraph-properties fo:line-height="150%">
        <style:tab-stops/>
      </style:paragraph-properties>
      <style:text-properties fo:font-size="6pt" officeooo:rsid="0042f2e5" officeooo:paragraph-rsid="004503d2" style:font-size-asian="5.25pt" style:font-size-complex="6pt"/>
    </style:style>
    <style:style style:name="P86" style:family="paragraph" style:parent-style-name="Standard">
      <style:paragraph-properties fo:line-height="150%">
        <style:tab-stops/>
      </style:paragraph-properties>
      <style:text-properties fo:font-weight="bold" officeooo:rsid="009c18ac" officeooo:paragraph-rsid="009da9d7" style:font-weight-asian="bold" style:font-weight-complex="bold"/>
    </style:style>
    <style:style style:name="P87" style:family="paragraph" style:parent-style-name="Standard">
      <style:text-properties fo:font-size="6pt" style:font-size-asian="5.25pt" style:font-size-complex="6pt"/>
    </style:style>
    <style:style style:name="P88" style:family="paragraph" style:parent-style-name="Standard">
      <style:text-properties officeooo:rsid="00d581ca" officeooo:paragraph-rsid="00d581ca"/>
    </style:style>
    <style:style style:name="P89" style:family="paragraph" style:parent-style-name="Standard">
      <style:paragraph-properties fo:margin-top="0in" fo:margin-bottom="0.0402in" style:contextual-spacing="false"/>
    </style:style>
    <style:style style:name="P90" style:family="paragraph" style:parent-style-name="Standard">
      <style:paragraph-properties fo:margin-left="0.4925in" fo:margin-top="0in" fo:margin-bottom="0in" style:contextual-spacing="false" fo:text-indent="0in" style:auto-text-indent="false"/>
    </style:style>
    <style:style style:name="P91" style:family="paragraph" style:parent-style-name="Standard">
      <style:text-properties officeooo:paragraph-rsid="00efb69a"/>
    </style:style>
    <style:style style:name="P92" style:family="paragraph" style:parent-style-name="Text_20_body">
      <style:paragraph-properties fo:margin-top="0in" fo:margin-bottom="0.0972in" style:contextual-spacing="false" fo:line-height="115%" fo:text-align="left" style:justify-single-word="false" style:writing-mode="lr-tb"/>
      <style:text-properties officeooo:paragraph-rsid="001227dc"/>
    </style:style>
    <style:style style:name="P93" style:family="paragraph" style:parent-style-name="Text_20_body">
      <style:paragraph-properties fo:margin-top="0in" fo:margin-bottom="0in" style:contextual-spacing="false" fo:text-align="justify" style:justify-single-word="false"/>
      <style:text-properties officeooo:paragraph-rsid="001227dc"/>
    </style:style>
    <style:style style:name="T1" style:family="text">
      <style:text-properties officeooo:rsid="00a56a9a"/>
    </style:style>
    <style:style style:name="T2" style:family="text">
      <style:text-properties officeooo:rsid="002673bd"/>
    </style:style>
    <style:style style:name="T3" style:family="text">
      <style:text-properties officeooo:rsid="006fb666"/>
    </style:style>
    <style:style style:name="T4" style:family="text">
      <style:text-properties officeooo:rsid="00960937"/>
    </style:style>
    <style:style style:name="T5" style:family="text">
      <style:text-properties officeooo:rsid="00d090f6"/>
    </style:style>
    <style:style style:name="T6" style:family="text">
      <style:text-properties officeooo:rsid="002540a9"/>
    </style:style>
    <style:style style:name="T7" style:family="text">
      <style:text-properties officeooo:rsid="0022767c"/>
    </style:style>
    <style:style style:name="T8" style:family="text">
      <style:text-properties officeooo:rsid="00777034"/>
    </style:style>
    <style:style style:name="T9" style:family="text">
      <style:text-properties officeooo:rsid="00c8586f"/>
    </style:style>
    <style:style style:name="T10" style:family="text">
      <style:text-properties officeooo:rsid="00c751f4"/>
    </style:style>
    <style:style style:name="T11" style:family="text">
      <style:text-properties fo:font-size="6pt" fo:font-weight="normal" officeooo:rsid="00349921" style:font-size-asian="5.25pt" style:font-weight-asian="normal" style:font-size-complex="6pt" style:font-weight-complex="normal"/>
    </style:style>
    <style:style style:name="T12" style:family="text">
      <style:text-properties fo:font-weight="bold" officeooo:rsid="00ce5015" style:font-weight-asian="bold" style:font-weight-complex="bold"/>
    </style:style>
    <style:style style:name="T13" style:family="text">
      <style:text-properties fo:font-weight="normal" officeooo:rsid="00ce5015" style:font-weight-asian="normal" style:font-weight-complex="normal"/>
    </style:style>
    <style:style style:name="T14" style:family="text">
      <style:text-properties fo:font-weight="normal" officeooo:rsid="00ccd8d4" style:font-weight-asian="normal" style:font-weight-complex="normal"/>
    </style:style>
    <style:style style:name="T15" style:family="text">
      <style:text-properties fo:font-weight="normal" officeooo:rsid="0106b376" style:font-weight-asian="normal" style:font-weight-complex="normal"/>
    </style:style>
    <style:style style:name="T16" style:family="text">
      <style:text-properties fo:font-family="FontAwesome" fo:font-size="10pt" fo:font-weight="normal" officeooo:rsid="00ccd8d4" style:font-family-asian="FontAwesome" style:font-size-asian="10pt" style:font-weight-asian="normal" style:font-family-complex="FontAwesome" style:font-size-complex="10pt" style:font-weight-complex="normal"/>
    </style:style>
    <style:style style:name="T17" style:family="text">
      <style:text-properties style:font-name="Liberation Serif" fo:font-size="10pt" fo:font-weight="normal" officeooo:rsid="00ccd8d4" style:font-name-asian="WenQuanYi Micro Hei" style:font-size-asian="10pt" style:font-weight-asian="normal" style:font-name-complex="Noto Sans1" style:font-size-complex="10pt" style:font-weight-complex="normal"/>
    </style:style>
    <style:style style:name="T18" style:family="text">
      <style:text-properties fo:font-size="6pt" fo:font-weight="normal" officeooo:rsid="00ccd8d4" style:font-size-asian="5.25pt" style:font-weight-asian="normal" style:font-size-complex="6pt" style:font-weight-complex="normal"/>
    </style:style>
    <style:style style:name="T19" style:family="text">
      <style:text-properties officeooo:rsid="0037e6ac"/>
    </style:style>
    <style:style style:name="T20" style:family="text">
      <style:text-properties officeooo:rsid="003333dc"/>
    </style:style>
    <style:style style:name="T21" style:family="text">
      <style:text-properties officeooo:rsid="008d38c3"/>
    </style:style>
    <style:style style:name="T22" style:family="text">
      <style:text-properties officeooo:rsid="0021fb55"/>
    </style:style>
    <style:style style:name="T23" style:family="text">
      <style:text-properties fo:font-style="italic" officeooo:rsid="002540a9" style:font-style-asian="italic" style:font-style-complex="italic"/>
    </style:style>
    <style:style style:name="T24" style:family="text">
      <style:text-properties officeooo:rsid="0047151f"/>
    </style:style>
    <style:style style:name="T25" style:family="text">
      <style:text-properties officeooo:rsid="003d1c73"/>
    </style:style>
    <style:style style:name="T26" style:family="text">
      <style:text-properties officeooo:rsid="00381816"/>
    </style:style>
    <style:style style:name="T27" style:family="text">
      <style:text-properties officeooo:rsid="00de7c27"/>
    </style:style>
    <style:style style:name="T28" style:family="text">
      <style:text-properties fo:font-size="12pt" officeooo:rsid="0084e7be" style:font-size-asian="10.5pt" style:font-size-complex="12pt"/>
    </style:style>
    <style:style style:name="T29" style:family="text">
      <style:text-properties fo:font-size="12pt" officeooo:rsid="00ab1597" style:font-size-asian="10.5pt" style:font-size-complex="12pt"/>
    </style:style>
    <style:style style:name="T30" style:family="text">
      <style:text-properties fo:font-family="FontAwesome" fo:font-size="12pt" officeooo:rsid="00afa9fb" style:font-family-asian="FontAwesome" style:font-size-asian="10.5pt" style:font-family-complex="FontAwesome" style:font-size-complex="12pt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69aae2"/>
    </style:style>
    <style:style style:name="T33" style:family="text">
      <style:text-properties officeooo:rsid="009e975d"/>
    </style:style>
    <style:style style:name="T34" style:family="text">
      <style:text-properties officeooo:rsid="00d30a7c"/>
    </style:style>
    <style:style style:name="T35" style:family="text">
      <style:text-properties officeooo:rsid="00761d79"/>
    </style:style>
    <style:style style:name="T36" style:family="text">
      <style:text-properties fo:font-family="FontAwesome" fo:font-weight="bold" officeooo:rsid="007c7ca8" style:font-family-asian="FontAwesome" style:font-weight-asian="bold" style:font-family-complex="FontAwesome" style:font-weight-complex="bold"/>
    </style:style>
    <style:style style:name="T37" style:family="text">
      <style:text-properties officeooo:rsid="00764019"/>
    </style:style>
    <style:style style:name="T38" style:family="text">
      <style:text-properties officeooo:rsid="00de8cda"/>
    </style:style>
    <style:style style:name="T39" style:family="text">
      <style:text-properties fo:font-weight="bold" officeooo:rsid="00de7c27" style:font-weight-asian="bold" style:font-weight-complex="bold"/>
    </style:style>
    <style:style style:name="T40" style:family="text">
      <style:text-properties fo:font-weight="bold" officeooo:rsid="00a85ef5" style:font-weight-asian="bold" style:font-weight-complex="bold"/>
    </style:style>
    <style:style style:name="T41" style:family="text">
      <style:text-properties fo:font-weight="bold" officeooo:rsid="0035b83b" style:font-weight-asian="bold" style:font-weight-complex="bold"/>
    </style:style>
    <style:style style:name="T42" style:family="text">
      <style:text-properties fo:font-weight="normal" officeooo:rsid="0035b83b" style:font-weight-asian="normal" style:font-weight-complex="normal"/>
    </style:style>
    <style:style style:name="T43" style:family="text">
      <style:text-properties fo:font-weight="normal" officeooo:rsid="005c5f75" style:font-weight-asian="normal" style:font-weight-complex="normal"/>
    </style:style>
    <style:style style:name="T44" style:family="text">
      <style:text-properties fo:font-style="italic" fo:font-weight="normal" officeooo:rsid="00a05049" style:font-style-asian="italic" style:font-weight-asian="normal" style:font-style-complex="italic" style:font-weight-complex="normal"/>
    </style:style>
    <style:style style:name="T45" style:family="text">
      <style:text-properties fo:font-weight="normal" officeooo:rsid="00a05049" style:font-weight-asian="normal" style:font-weight-complex="normal"/>
    </style:style>
    <style:style style:name="T46" style:family="text">
      <style:text-properties fo:font-weight="normal" officeooo:rsid="004df516" style:font-weight-asian="normal" style:font-weight-complex="normal"/>
    </style:style>
    <style:style style:name="T47" style:family="text">
      <style:text-properties fo:font-weight="normal" officeooo:rsid="00de7c27" style:font-weight-asian="normal" style:font-weight-complex="normal"/>
    </style:style>
    <style:style style:name="T48" style:family="text">
      <style:text-properties fo:font-size="6pt" fo:font-weight="normal" officeooo:rsid="00a05049" style:font-size-asian="5.25pt" style:font-weight-asian="normal" style:font-size-complex="6pt" style:font-weight-complex="normal"/>
    </style:style>
    <style:style style:name="T49" style:family="text">
      <style:text-properties officeooo:rsid="00a85ef5"/>
    </style:style>
    <style:style style:name="T50" style:family="text">
      <style:text-properties officeooo:rsid="004df516"/>
    </style:style>
    <style:style style:name="T51" style:family="text">
      <style:text-properties fo:font-family="FontAwesome" officeooo:rsid="007c7ca8" style:font-family-asian="FontAwesome" style:font-family-complex="FontAwesome"/>
    </style:style>
    <style:style style:name="T52" style:family="text">
      <style:text-properties style:font-name="Liberation Serif" officeooo:rsid="00a85ef5" style:font-family-asian="FontAwesome" style:font-family-complex="FontAwesome"/>
    </style:style>
    <style:style style:name="T53" style:family="text">
      <style:text-properties fo:font-family="FontAwesome" fo:font-size="11pt" officeooo:rsid="00b395e5" style:font-family-asian="FontAwesome" style:font-size-asian="11pt" style:font-family-complex="FontAwesome" style:font-size-complex="11pt"/>
    </style:style>
    <style:style style:name="T54" style:family="text">
      <style:text-properties style:font-name="Liberation Serif" officeooo:rsid="00b395e5" style:font-name-asian="WenQuanYi Micro Hei" style:font-name-complex="Noto Sans1"/>
    </style:style>
    <style:style style:name="T55" style:family="text">
      <style:text-properties officeooo:rsid="00b395e5"/>
    </style:style>
    <style:style style:name="T56" style:family="text">
      <style:text-properties officeooo:rsid="00a9ae96"/>
    </style:style>
    <style:style style:name="T57" style:family="text">
      <style:text-properties officeooo:rsid="00c1b755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349921" style:font-weight-asian="normal" style:font-weight-complex="normal"/>
    </style:style>
    <style:style style:name="T60" style:family="text">
      <style:text-properties fo:font-weight="normal" officeooo:rsid="00a85ef5" style:font-weight-asian="normal" style:font-weight-complex="normal"/>
    </style:style>
    <style:style style:name="T61" style:family="text">
      <style:text-properties fo:font-weight="normal" officeooo:rsid="0021fb55" style:font-weight-asian="normal" style:font-weight-complex="normal"/>
    </style:style>
    <style:style style:name="T62" style:family="text">
      <style:text-properties fo:font-weight="normal" officeooo:rsid="00c1b755" style:font-weight-asian="normal" style:font-weight-complex="normal"/>
    </style:style>
    <style:style style:name="T63" style:family="text">
      <style:text-properties fo:font-style="italic" fo:font-weight="normal" officeooo:rsid="00c1b755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ccd8d4" style:font-style-asian="italic" style:font-weight-asian="normal" style:font-style-complex="italic" style:font-weight-complex="normal"/>
    </style:style>
    <style:style style:name="T65" style:family="text">
      <style:text-properties fo:font-weight="normal" officeooo:rsid="00c9c4c6" style:font-weight-asian="normal" style:font-weight-complex="normal"/>
    </style:style>
    <style:style style:name="T66" style:family="text">
      <style:text-properties fo:font-size="6pt" fo:font-weight="normal" officeooo:rsid="00c9c4c6" style:font-size-asian="5.25pt" style:font-weight-asian="normal" style:font-size-complex="6pt" style:font-weight-complex="normal"/>
    </style:style>
    <style:style style:name="T67" style:family="text">
      <style:text-properties fo:font-weight="normal" officeooo:rsid="00c31515" style:font-weight-asian="normal" style:font-weight-complex="normal"/>
    </style:style>
    <style:style style:name="T68" style:family="text">
      <style:text-properties fo:font-weight="normal" officeooo:rsid="009e975d" style:font-weight-asian="normal" style:font-weight-complex="normal"/>
    </style:style>
    <style:style style:name="T69" style:family="text">
      <style:text-properties fo:font-family="FontAwesome" fo:font-weight="normal" officeooo:rsid="00b395e5" style:font-family-asian="FontAwesome" style:font-weight-asian="normal" style:font-family-complex="FontAwesome" style:font-weight-complex="normal"/>
    </style:style>
    <style:style style:name="T70" style:family="text">
      <style:text-properties style:font-name="Liberation Serif" fo:font-weight="normal" officeooo:rsid="00b395e5" style:font-name-asian="WenQuanYi Micro Hei" style:font-weight-asian="normal" style:font-name-complex="Noto Sans1" style:font-weight-complex="normal"/>
    </style:style>
    <style:style style:name="T71" style:family="text">
      <style:text-properties fo:font-size="12pt" fo:font-weight="bold" officeooo:rsid="004f787a" style:font-size-asian="10.5pt" style:font-weight-asian="bold" style:font-size-complex="12pt" style:font-weight-complex="bold"/>
    </style:style>
    <style:style style:name="T72" style:family="text">
      <style:text-properties fo:font-size="12pt" fo:font-weight="bold" officeooo:rsid="00c31515" style:font-size-asian="10.5pt" style:font-weight-asian="bold" style:font-size-complex="12pt" style:font-weight-complex="bold"/>
    </style:style>
    <style:style style:name="T73" style:family="text">
      <style:text-properties fo:font-size="12pt" fo:font-weight="bold" officeooo:rsid="004fd730" style:font-size-asian="10.5pt" style:font-weight-asian="bold" style:font-size-complex="12pt" style:font-weight-complex="bold"/>
    </style:style>
    <style:style style:name="T74" style:family="text">
      <style:text-properties fo:font-size="12pt" fo:font-weight="bold" officeooo:rsid="00ee56c6" style:font-size-asian="10.5pt" style:font-weight-asian="bold" style:font-size-complex="12pt" style:font-weight-complex="bold"/>
    </style:style>
    <style:style style:name="T75" style:family="text">
      <style:text-properties fo:font-size="12pt" fo:font-weight="bold" officeooo:rsid="005662ed" style:font-size-asian="10.5pt" style:font-weight-asian="bold" style:font-size-complex="12pt" style:font-weight-complex="bold"/>
    </style:style>
    <style:style style:name="T76" style:family="text">
      <style:text-properties fo:font-size="12pt" fo:font-weight="normal" officeooo:rsid="004f787a" style:font-size-asian="10.5pt" style:font-weight-asian="normal" style:font-size-complex="12pt" style:font-weight-complex="normal"/>
    </style:style>
    <style:style style:name="T77" style:family="text">
      <style:text-properties fo:font-size="12pt" fo:font-weight="normal" officeooo:rsid="00704656" style:font-size-asian="10.5pt" style:font-weight-asian="normal" style:font-size-complex="12pt" style:font-weight-complex="normal"/>
    </style:style>
    <style:style style:name="T78" style:family="text">
      <style:text-properties fo:font-family="FontAwesome" fo:font-size="12pt" fo:font-weight="normal" officeooo:rsid="00c4e599" style:font-family-asian="FontAwesome" style:font-size-asian="10.5pt" style:font-weight-asian="normal" style:font-family-complex="FontAwesome" style:font-size-complex="12pt" style:font-weight-complex="normal"/>
    </style:style>
    <style:style style:name="T79" style:family="text">
      <style:text-properties style:font-name="Liberation Serif" fo:font-size="12pt" fo:font-weight="normal" officeooo:rsid="00c4e599" style:font-name-asian="WenQuanYi Micro Hei" style:font-size-asian="10.5pt" style:font-weight-asian="normal" style:font-name-complex="Noto Sans1" style:font-size-complex="12pt" style:font-weight-complex="normal"/>
    </style:style>
    <style:style style:name="T80" style:family="text">
      <style:text-properties fo:font-size="12pt" fo:font-weight="normal" officeooo:rsid="0051c5f2" style:font-size-asian="10.5pt" style:font-weight-asian="normal" style:font-size-complex="12pt" style:font-weight-complex="normal"/>
    </style:style>
    <style:style style:name="T81" style:family="text">
      <style:text-properties fo:font-size="12pt" fo:font-weight="normal" officeooo:rsid="006acd40" style:font-size-asian="10.5pt" style:font-weight-asian="normal" style:font-size-complex="12pt" style:font-weight-complex="normal"/>
    </style:style>
    <style:style style:name="T82" style:family="text">
      <style:text-properties fo:font-size="12pt" fo:font-weight="normal" officeooo:rsid="00c4e599" style:font-size-asian="10.5pt" style:font-weight-asian="normal" style:font-size-complex="12pt" style:font-weight-complex="normal"/>
    </style:style>
    <style:style style:name="T83" style:family="text">
      <style:text-properties fo:font-size="12pt" fo:font-weight="bold" officeooo:rsid="00c4e599" style:font-size-asian="10.5pt" style:font-weight-asian="bold" style:font-size-complex="12pt" style:font-weight-complex="bold"/>
    </style:style>
    <style:style style:name="T84" style:family="text">
      <style:text-properties fo:font-size="12pt" fo:font-weight="normal" officeooo:rsid="00ee56c6" style:font-size-asian="10.5pt" style:font-weight-asian="normal" style:font-size-complex="12pt" style:font-weight-complex="normal"/>
    </style:style>
    <style:style style:name="T85" style:family="text">
      <style:text-properties fo:font-size="12pt" fo:font-weight="normal" officeooo:rsid="006bea3a" style:font-size-asian="10.5pt" style:font-weight-asian="normal" style:font-size-complex="12pt" style:font-weight-complex="normal"/>
    </style:style>
    <style:style style:name="T86" style:family="text">
      <style:text-properties fo:font-size="6pt" fo:font-weight="normal" officeooo:rsid="004f787a" style:font-size-asian="5.25pt" style:font-weight-asian="normal" style:font-size-complex="6pt" style:font-weight-complex="normal"/>
    </style:style>
    <style:style style:name="T87" style:family="text">
      <style:text-properties fo:font-size="12pt" fo:font-weight="bold" officeooo:rsid="00d74f6a" style:font-size-asian="10.5pt" style:font-weight-asian="bold" style:font-size-complex="12pt" style:font-weight-complex="bold"/>
    </style:style>
    <style:style style:name="T88" style:family="text">
      <style:text-properties fo:font-size="12pt" fo:font-weight="bold" officeooo:rsid="00d95910" style:font-size-asian="10.5pt" style:font-weight-asian="bold" style:font-size-complex="12pt" style:font-weight-complex="bold"/>
    </style:style>
    <style:style style:name="T89" style:family="text">
      <style:text-properties fo:font-size="12pt" fo:font-weight="normal" officeooo:rsid="00d74f6a" style:font-size-asian="10.5pt" style:font-weight-asian="normal" style:font-size-complex="12pt" style:font-weight-complex="normal"/>
    </style:style>
    <style:style style:name="T90" style:family="text">
      <style:text-properties fo:font-size="12pt" fo:font-weight="normal" officeooo:rsid="00d95910" style:font-size-asian="10.5pt" style:font-weight-asian="normal" style:font-size-complex="12pt" style:font-weight-complex="normal"/>
    </style:style>
    <style:style style:name="T91" style:family="text">
      <style:text-properties fo:font-size="12pt" fo:font-weight="normal" officeooo:rsid="00d7bd14" style:font-size-asian="10.5pt" style:font-weight-asian="normal" style:font-size-complex="12pt" style:font-weight-complex="normal"/>
    </style:style>
    <style:style style:name="T92" style:family="text">
      <style:text-properties officeooo:rsid="009272de"/>
    </style:style>
    <style:style style:name="T93" style:family="text">
      <style:text-properties fo:font-size="12pt" fo:font-weight="normal" officeooo:rsid="009272de" style:font-size-asian="10.5pt" style:font-weight-asian="normal" style:font-size-complex="12pt" style:font-weight-complex="normal"/>
    </style:style>
    <style:style style:name="T94" style:family="text">
      <style:text-properties fo:font-family="FontAwesome" fo:font-size="12pt" fo:font-weight="normal" officeooo:rsid="00a9ae96" style:font-family-asian="FontAwesome" style:font-size-asian="10.5pt" style:font-weight-asian="normal" style:font-family-complex="FontAwesome" style:font-size-complex="12pt" style:font-weight-complex="normal"/>
    </style:style>
    <style:style style:name="T95" style:family="text">
      <style:text-properties style:font-name="Liberation Serif" fo:font-size="12pt" fo:font-weight="normal" officeooo:rsid="00a9ae96" style:font-name-asian="WenQuanYi Micro Hei" style:font-size-asian="10.5pt" style:font-weight-asian="normal" style:font-name-complex="Noto Sans1" style:font-size-complex="12pt" style:font-weight-complex="normal"/>
    </style:style>
    <style:style style:name="T96" style:family="text">
      <style:text-properties fo:font-size="6pt" fo:font-weight="normal" officeooo:rsid="009272de" style:font-size-asian="5.25pt" style:font-weight-asian="normal" style:font-size-complex="6pt" style:font-weight-complex="normal"/>
    </style:style>
    <style:style style:name="T97" style:family="text">
      <style:text-properties fo:font-size="12pt" fo:font-weight="normal" officeooo:rsid="0090fd26" style:font-size-asian="10.5pt" style:font-weight-asian="normal" style:font-size-complex="12pt" style:font-weight-complex="normal"/>
    </style:style>
    <style:style style:name="T98" style:family="text">
      <style:text-properties fo:font-size="12pt" fo:font-weight="normal" style:font-size-asian="10.5pt" style:font-weight-asian="normal" style:font-size-complex="12pt" style:font-weight-complex="normal"/>
    </style:style>
    <style:style style:name="T99" style:family="text">
      <style:text-properties fo:font-size="6pt" fo:font-weight="normal" style:font-size-asian="5.25pt" style:font-weight-asian="normal" style:font-size-complex="6pt" style:font-weight-complex="normal"/>
    </style:style>
    <style:style style:name="T100" style:family="text">
      <style:text-properties officeooo:rsid="00b77de3"/>
    </style:style>
    <style:style style:name="T101" style:family="text">
      <style:text-properties fo:font-family="'Standard Symbols PS'" officeooo:rsid="009272de"/>
    </style:style>
    <style:style style:name="T102" style:family="text">
      <style:text-properties fo:font-weight="normal" officeooo:rsid="00349736" style:font-weight-asian="normal" style:font-weight-complex="normal"/>
    </style:style>
    <style:style style:name="T103" style:family="text">
      <style:text-properties fo:font-size="12pt" fo:font-weight="normal" officeooo:rsid="00bde73f" style:font-size-asian="10.5pt" style:font-weight-asian="normal" style:font-size-complex="12pt" style:font-weight-complex="normal"/>
    </style:style>
    <style:style style:name="T104" style:family="text">
      <style:text-properties fo:font-size="6pt" fo:font-weight="normal" officeooo:rsid="00bde73f" style:font-size-asian="5.25pt" style:font-weight-asian="normal" style:font-size-complex="6pt" style:font-weight-complex="normal"/>
    </style:style>
    <style:style style:name="T105" style:family="text">
      <style:text-properties fo:font-size="12pt" fo:font-weight="bold" officeooo:rsid="00939cf2" style:font-size-asian="10.5pt" style:font-weight-asian="bold" style:font-size-complex="12pt" style:font-weight-complex="bold"/>
    </style:style>
    <style:style style:name="T106" style:family="text">
      <style:text-properties fo:font-size="12pt" fo:font-weight="bold" officeooo:rsid="0090fd26" style:font-size-asian="10.5pt" style:font-weight-asian="bold" style:font-size-complex="12pt" style:font-weight-complex="bold"/>
    </style:style>
    <style:style style:name="T107" style:family="text">
      <style:text-properties fo:font-size="12pt" fo:font-weight="normal" officeooo:rsid="00939cf2" style:font-size-asian="10.5pt" style:font-weight-asian="normal" style:font-size-complex="12pt" style:font-weight-complex="normal"/>
    </style:style>
    <style:style style:name="T108" style:family="text">
      <style:text-properties fo:font-size="12pt" fo:font-weight="normal" officeooo:rsid="0056d4b8" style:font-size-asian="10.5pt" style:font-weight-asian="normal" style:font-size-complex="12pt" style:font-weight-complex="normal"/>
    </style:style>
    <style:style style:name="T109" style:family="text">
      <style:text-properties fo:font-size="12pt" fo:font-weight="normal" officeooo:rsid="0094b094" style:font-size-asian="10.5pt" style:font-weight-asian="normal" style:font-size-complex="12pt" style:font-weight-complex="normal"/>
    </style:style>
    <style:style style:name="T110" style:family="text">
      <style:text-properties fo:font-size="12pt" fo:font-weight="normal" officeooo:rsid="00b92301" style:font-size-asian="10.5pt" style:font-weight-asian="normal" style:font-size-complex="12pt" style:font-weight-complex="normal"/>
    </style:style>
    <style:style style:name="T111" style:family="text">
      <style:text-properties fo:font-size="6pt" fo:font-weight="normal" officeooo:rsid="00349736" style:font-size-asian="5.25pt" style:font-weight-asian="normal" style:font-size-complex="6pt" style:font-weight-complex="normal"/>
    </style:style>
    <style:style style:name="T112" style:family="text">
      <style:text-properties fo:font-weight="normal" officeooo:rsid="00b92301" style:font-weight-asian="normal" style:font-weight-complex="normal"/>
    </style:style>
    <style:style style:name="T113" style:family="text">
      <style:text-properties fo:font-weight="normal" officeooo:rsid="0056d4b8" style:font-weight-asian="normal" style:font-weight-complex="normal"/>
    </style:style>
    <style:style style:name="T114" style:family="text">
      <style:text-properties fo:font-weight="normal" officeooo:rsid="009272de" style:font-weight-asian="normal" style:font-weight-complex="normal"/>
    </style:style>
    <style:style style:name="T115" style:family="text">
      <style:text-properties fo:font-weight="normal" officeooo:rsid="003671a7" style:font-weight-asian="normal" style:font-weight-complex="normal"/>
    </style:style>
    <style:style style:name="T116" style:family="text">
      <style:text-properties fo:font-weight="normal" officeooo:rsid="00381816" style:font-weight-asian="normal" style:font-weight-complex="normal"/>
    </style:style>
    <style:style style:name="T117" style:family="text">
      <style:text-properties fo:font-family="FontAwesome" fo:font-weight="normal" officeooo:rsid="00a05049" style:font-family-asian="FontAwesome" style:font-weight-asian="normal" style:font-family-complex="FontAwesome" style:font-weight-complex="normal"/>
    </style:style>
    <style:style style:name="T118" style:family="text">
      <style:text-properties style:font-name="Liberation Serif" fo:font-weight="normal" officeooo:rsid="00a05049" style:font-name-asian="WenQuanYi Micro Hei" style:font-weight-asian="normal" style:font-name-complex="Noto Sans1" style:font-weight-complex="normal"/>
    </style:style>
    <style:style style:name="T119" style:family="text">
      <style:text-properties fo:font-size="6pt" fo:font-weight="normal" officeooo:rsid="003671a7" style:font-size-asian="5.25pt" style:font-weight-asian="normal" style:font-size-complex="6pt" style:font-weight-complex="normal"/>
    </style:style>
    <style:style style:name="T120" style:family="text">
      <style:text-properties fo:font-size="12pt" officeooo:rsid="0094b094" style:font-size-asian="10.5pt" style:font-size-complex="12pt"/>
    </style:style>
    <style:style style:name="T121" style:family="text">
      <style:text-properties fo:font-size="12pt" fo:font-weight="normal" officeooo:rsid="00bc6100" style:font-size-asian="10.5pt" style:font-weight-asian="normal" style:font-size-complex="12pt" style:font-weight-complex="normal"/>
    </style:style>
    <style:style style:name="T122" style:family="text">
      <style:text-properties officeooo:rsid="00cad79f"/>
    </style:style>
    <style:style style:name="T123" style:family="text">
      <style:text-properties officeooo:rsid="00bc19f8"/>
    </style:style>
    <style:style style:name="T124" style:family="text">
      <style:text-properties officeooo:rsid="00db4ceb"/>
    </style:style>
    <style:style style:name="T125" style:family="text">
      <style:text-properties officeooo:rsid="00bc6100"/>
    </style:style>
    <style:style style:name="T126" style:family="text">
      <style:text-properties officeooo:rsid="00ba324b"/>
    </style:style>
    <style:style style:name="T127" style:family="text">
      <style:text-properties fo:font-family="FontAwesome" fo:font-size="10pt" officeooo:rsid="00ba324b" style:font-family-asian="FontAwesome" style:font-size-asian="10pt" style:font-family-complex="FontAwesome" style:font-size-complex="10pt"/>
    </style:style>
    <style:style style:name="T128" style:family="text">
      <style:text-properties officeooo:rsid="00ee3423"/>
    </style:style>
    <style:style style:name="T129" style:family="text">
      <style:text-properties fo:font-family="'Font Awesome 7 Free Solid'" officeooo:rsid="00ec5acf" style:font-family-asian="'Font Awesome 7 Free Solid'" style:font-family-complex="'Font Awesome 7 Free Solid'"/>
    </style:style>
    <style:style style:name="T130" style:family="text">
      <style:text-properties officeooo:rsid="00e1f25e"/>
    </style:style>
    <style:style style:name="T131" style:family="text">
      <style:text-properties fo:font-family="'Mono Uralic'" style:font-pitch="variable" fo:font-size="10pt" style:font-size-asian="10pt" style:font-size-complex="10pt"/>
    </style:style>
    <style:style style:name="T132" style:family="text">
      <style:text-properties officeooo:rsid="00e6a12e"/>
    </style:style>
    <style:style style:name="T133" style:family="text">
      <style:text-properties officeooo:rsid="004f00cf"/>
    </style:style>
    <style:style style:name="T134" style:family="text">
      <style:text-properties officeooo:rsid="01684d5a"/>
    </style:style>
    <style:style style:name="T135" style:family="text">
      <style:text-properties officeooo:rsid="01555911"/>
    </style:style>
    <style:style style:name="T136" style:family="text">
      <style:text-properties officeooo:rsid="00b92301"/>
    </style:style>
    <style:style style:name="T137" style:family="text">
      <style:text-properties officeooo:rsid="00247410"/>
    </style:style>
    <style:style style:name="T138" style:family="text">
      <style:text-properties officeooo:rsid="01568f16"/>
    </style:style>
    <style:style style:name="T139" style:family="text">
      <style:text-properties fo:font-weight="bold" officeooo:rsid="0074edcd" style:font-weight-asian="bold" style:font-weight-complex="bold"/>
    </style:style>
    <style:style style:name="T140" style:family="text">
      <style:text-properties officeooo:rsid="0074edcd"/>
    </style:style>
    <style:style style:name="T141" style:family="text">
      <style:text-properties officeooo:rsid="0073b26a"/>
    </style:style>
    <style:style style:name="T142" style:family="text">
      <style:text-properties officeooo:rsid="000c10bf"/>
    </style:style>
    <style:style style:name="T143" style:family="text">
      <style:text-properties officeooo:rsid="0067ab0a"/>
    </style:style>
    <style:style style:name="T144" style:family="text">
      <style:text-properties style:text-underline-style="solid" style:text-underline-width="auto" style:text-underline-color="font-color" fo:font-weight="bold" officeooo:rsid="0073b26a" style:font-weight-asian="bold" style:font-weight-complex="bold"/>
    </style:style>
    <style:style style:name="T145" style:family="text">
      <style:text-properties loext:padding="0in" loext:border="none"/>
    </style:style>
    <style:style style:name="T146" style:family="text">
      <style:text-properties fo:font-family="'Standard Symbols PS'" officeooo:rsid="006eb6dd" loext:padding="0in" loext:border="none"/>
    </style:style>
    <style:style style:name="T147" style:family="text">
      <style:text-properties officeooo:rsid="007cea81"/>
    </style:style>
    <style:style style:name="T148" style:family="text">
      <style:text-properties fo:language="en" fo:country="US" officeooo:rsid="00bf97f2"/>
    </style:style>
    <style:style style:name="T149" style:family="text">
      <style:text-properties fo:font-size="12pt" fo:language="en" fo:country="US" officeooo:rsid="00a21ee8" style:font-size-asian="12pt" style:font-size-complex="12pt"/>
    </style:style>
    <style:style style:name="T150" style:family="text">
      <style:text-properties fo:font-size="12pt" fo:language="en" fo:country="US" style:font-size-asian="12pt" style:font-size-complex="12pt"/>
    </style:style>
    <style:style style:name="T151" style:family="text">
      <style:text-properties fo:font-size="12pt" fo:language="en" fo:country="US" officeooo:rsid="00d4b468" style:font-size-asian="12pt" style:font-size-complex="12pt"/>
    </style:style>
    <style:style style:name="T152" style:family="text">
      <style:text-properties fo:font-size="12pt" fo:language="en" fo:country="US" officeooo:rsid="0083680e" style:font-size-asian="12pt" style:font-size-complex="12pt"/>
    </style:style>
    <style:style style:name="T153" style:family="text">
      <style:text-properties fo:font-size="12pt" fo:language="en" fo:country="US" officeooo:rsid="0080fcf2" style:font-size-asian="12pt" style:font-size-complex="12pt"/>
    </style:style>
    <style:style style:name="T154" style:family="text">
      <style:text-properties officeooo:rsid="0083680e"/>
    </style:style>
    <style:style style:name="T155" style:family="text">
      <style:text-properties officeooo:rsid="00b41866"/>
    </style:style>
    <style:style style:name="T156" style:family="text">
      <style:text-properties officeooo:rsid="00fdf0e8"/>
    </style:style>
    <style:style style:name="T157" style:family="text">
      <style:text-properties officeooo:rsid="00ff797d"/>
    </style:style>
    <style:style style:name="T158" style:family="text">
      <style:text-properties officeooo:rsid="010173b4"/>
    </style:style>
    <style:style style:name="T159" style:family="text">
      <style:text-properties officeooo:rsid="00faf332"/>
    </style:style>
    <style:style style:name="T160" style:family="text">
      <style:text-properties officeooo:rsid="00fd506c"/>
    </style:style>
    <style:style style:name="T161" style:family="text">
      <style:text-properties officeooo:rsid="00fbf659"/>
    </style:style>
    <style:style style:name="T162" style:family="text">
      <style:text-properties officeooo:rsid="00e5ce18"/>
    </style:style>
    <style:style style:name="T163" style:family="text">
      <style:text-properties officeooo:rsid="00e8a0d4"/>
    </style:style>
    <style:style style:name="T164" style:family="text">
      <style:text-properties officeooo:rsid="01030bae"/>
    </style:style>
    <style:style style:name="T165" style:family="text">
      <style:text-properties officeooo:rsid="0103d376"/>
    </style:style>
    <style:style style:name="T166" style:family="text">
      <style:text-properties officeooo:rsid="0027e27c"/>
    </style:style>
    <style:style style:name="T167" style:family="text">
      <style:text-properties officeooo:rsid="00436888"/>
    </style:style>
    <style:style style:name="T168" style:family="text">
      <style:text-properties officeooo:rsid="01057b12"/>
    </style:style>
    <style:style style:name="T169" style:family="text">
      <style:text-properties officeooo:rsid="00424b44"/>
    </style:style>
    <style:style style:name="T170" style:family="text">
      <style:text-properties fo:font-size="10pt" officeooo:rsid="00171e63" style:font-size-asian="10pt" style:font-size-complex="10pt"/>
    </style:style>
    <style:style style:name="T171" style:family="text">
      <style:text-properties style:font-name="Liberation Serif" fo:font-size="10pt" officeooo:rsid="0074edcd" style:font-size-asian="10pt" style:font-size-complex="10pt"/>
    </style:style>
    <style:style style:name="T172" style:family="text">
      <style:text-properties fo:font-size="10pt" officeooo:rsid="00424b44" style:font-size-asian="10pt" style:font-size-complex="10pt"/>
    </style:style>
    <style:style style:name="T173" style:family="text">
      <style:text-properties officeooo:rsid="00171e63"/>
    </style:style>
    <style:style style:name="T174" style:family="text">
      <style:text-properties officeooo:rsid="008909c2"/>
    </style:style>
    <style:style style:name="T175" style:family="text">
      <style:text-properties officeooo:rsid="010a5494"/>
    </style:style>
    <style:style style:name="T176" style:family="text">
      <style:text-properties officeooo:rsid="004b11ab"/>
    </style:style>
    <style:style style:name="T177" style:family="text">
      <style:text-properties fo:font-style="normal" fo:font-weight="bold" officeooo:rsid="00fa3098" style:font-style-asian="normal" style:font-weight-asian="bold" style:font-style-complex="normal" style:font-weight-complex="bold" loext:padding="0in" loext:border="none"/>
    </style:style>
    <style:style style:name="T178" style:family="text">
      <style:text-properties fo:font-style="normal" fo:font-weight="normal" officeooo:rsid="00fa3098" style:font-style-asian="normal" style:font-weight-asian="normal" style:font-style-complex="normal" style:font-weight-complex="normal" loext:padding="0in" loext:border="none"/>
    </style:style>
    <style:style style:name="T179" style:family="text">
      <style:text-properties fo:font-style="normal" fo:font-weight="normal" officeooo:rsid="008909c2" style:font-style-asian="normal" style:font-weight-asian="normal" style:font-style-complex="normal" style:font-weight-complex="normal" loext:padding="0in" loext:border="none"/>
    </style:style>
    <style:style style:name="T180" style:family="text">
      <style:text-properties fo:font-style="normal" officeooo:rsid="00fa3098" style:font-style-asian="normal" style:font-style-complex="normal" loext:padding="0in" loext:border="none"/>
    </style:style>
    <style:style style:name="T181" style:family="text">
      <style:text-properties fo:font-style="normal" officeooo:rsid="008909c2" style:font-style-asian="normal" style:font-style-complex="normal" loext:padding="0in" loext:border="none"/>
    </style:style>
    <style:style style:name="T182" style:family="text">
      <style:text-properties fo:font-family="'Noto Mono'" style:font-pitch="fixed" fo:font-size="10pt" fo:font-style="normal" officeooo:rsid="008909c2" style:font-size-asian="8.75pt" style:font-style-asian="normal" style:font-size-complex="10pt" style:font-style-complex="normal" loext:padding="0in" loext:border="none"/>
    </style:style>
    <style:style style:name="T183" style:family="text">
      <style:text-properties fo:font-family="'Noto Mono'" style:font-pitch="fixed" fo:font-size="10pt" fo:font-style="normal" fo:font-weight="bold" officeooo:rsid="008909c2" style:font-size-asian="8.75pt" style:font-style-asian="normal" style:font-weight-asian="bold" style:font-size-complex="10pt" style:font-style-complex="normal" style:font-weight-complex="bold" loext:padding="0in" loext:border="none"/>
    </style:style>
    <style:style style:name="T184" style:family="text">
      <style:text-properties fo:font-family="'Noto Mono'" style:font-pitch="fixed" fo:font-size="6pt" fo:font-style="normal" officeooo:rsid="008909c2" style:font-size-asian="5.25pt" style:font-style-asian="normal" style:font-size-complex="6pt" style:font-style-complex="normal" loext:padding="0in" loext:border="none"/>
    </style:style>
    <style:style style:name="T185" style:family="text">
      <style:text-properties fo:font-style="normal" fo:font-weight="bold" officeooo:rsid="008909c2" style:font-style-asian="normal" style:font-weight-asian="bold" style:font-style-complex="normal" style:font-weight-complex="bold" loext:padding="0in" loext:border="none"/>
    </style:style>
    <style:style style:name="T186" style:family="text">
      <style:text-properties fo:font-style="normal" officeooo:rsid="00b2da1f" style:font-style-asian="normal" style:font-style-complex="normal" loext:padding="0in" loext:border="none"/>
    </style:style>
    <style:style style:name="T187" style:family="text">
      <style:text-properties fo:font-style="normal" fo:font-weight="bold" officeooo:rsid="008a1952" style:font-style-asian="normal" style:font-weight-asian="bold" style:font-style-complex="normal" style:font-weight-complex="bold" loext:padding="0in" loext:border="none"/>
    </style:style>
    <style:style style:name="T188" style:family="text">
      <style:text-properties fo:font-style="normal" officeooo:rsid="008af0bb" style:font-style-asian="normal" style:font-style-complex="normal" loext:padding="0in" loext:border="none"/>
    </style:style>
    <style:style style:name="T189" style:family="text">
      <style:text-properties fo:font-style="normal" officeooo:rsid="008a1952" style:font-style-asian="normal" style:font-style-complex="normal" loext:padding="0in" loext:border="none"/>
    </style:style>
    <style:style style:name="T190" style:family="text">
      <style:text-properties fo:font-style="normal" fo:font-weight="bold" officeooo:rsid="00f73f5c" style:font-style-asian="normal" style:font-weight-asian="bold" style:font-style-complex="normal" style:font-weight-complex="bold" loext:padding="0in" loext:border="none"/>
    </style:style>
    <style:style style:name="T191" style:family="text">
      <style:text-properties fo:font-style="normal" officeooo:rsid="00f73f5c" style:font-style-asian="normal" style:font-style-complex="normal" loext:padding="0in" loext:border="none"/>
    </style:style>
    <style:style style:name="T192" style:family="text">
      <style:text-properties fo:font-style="normal" officeooo:rsid="00ff797d" style:font-style-asian="normal" style:font-style-complex="normal" loext:padding="0in" loext:border="none"/>
    </style:style>
    <style:style style:name="T193" style:family="text">
      <style:text-properties fo:font-style="normal" officeooo:rsid="00f87492" style:font-style-asian="normal" style:font-style-complex="normal" loext:padding="0in" loext:border="none"/>
    </style:style>
    <style:style style:name="T194" style:family="text">
      <style:text-properties fo:font-family="FontAwesome" fo:font-size="10pt" fo:font-style="normal" officeooo:rsid="00fc0cc6" style:font-family-asian="FontAwesome" style:font-size-asian="10pt" style:font-style-asian="normal" style:font-family-complex="FontAwesome" style:font-size-complex="10pt" style:font-style-complex="normal" loext:padding="0in" loext:border="none"/>
    </style:style>
    <style:style style:name="T195" style:family="text">
      <style:text-properties style:font-name="Liberation Serif" fo:font-size="10pt" fo:font-style="normal" officeooo:rsid="00fc0cc6" style:font-name-asian="WenQuanYi Micro Hei" style:font-size-asian="10pt" style:font-style-asian="normal" style:font-name-complex="Noto Sans1" style:font-size-complex="10pt" style:font-style-complex="normal" loext:padding="0in" loext:border="none"/>
    </style:style>
    <style:style style:name="T196" style:family="text">
      <style:text-properties fo:font-size="6pt" fo:font-style="normal" officeooo:rsid="00f73f5c" style:font-size-asian="5.25pt" style:font-style-asian="normal" style:font-size-complex="6pt" style:font-style-complex="normal" loext:padding="0in" loext:border="none"/>
    </style:style>
    <style:style style:name="T197" style:family="text">
      <style:text-properties fo:font-weight="bold" officeooo:rsid="000c10bf" style:font-weight-asian="bold" style:font-weight-complex="bold"/>
    </style:style>
    <style:style style:name="T198" style:family="text">
      <style:text-properties fo:font-weight="bold" officeooo:rsid="00424b44" style:font-weight-asian="bold" style:font-weight-complex="bold"/>
    </style:style>
    <style:style style:name="T199" style:family="text">
      <style:text-properties fo:font-weight="bold" officeooo:rsid="00381816" style:font-weight-asian="bold" style:font-weight-complex="bold"/>
    </style:style>
    <style:style style:name="T200" style:family="text">
      <style:text-properties fo:font-weight="normal" officeooo:rsid="00424b44" style:font-weight-asian="normal" style:font-weight-complex="normal"/>
    </style:style>
    <style:style style:name="T201" style:family="text">
      <style:text-properties officeooo:rsid="001e604c"/>
    </style:style>
    <style:style style:name="T202" style:family="text">
      <style:text-properties officeooo:rsid="00ddc86b"/>
    </style:style>
    <style:style style:name="T203" style:family="text">
      <style:text-properties officeooo:rsid="008f8318"/>
    </style:style>
    <style:style style:name="T204" style:family="text">
      <style:text-properties officeooo:rsid="00996c47"/>
    </style:style>
    <style:style style:name="T205" style:family="text">
      <style:text-properties officeooo:rsid="00a3cefc"/>
    </style:style>
    <style:style style:name="T206" style:family="text">
      <style:text-properties style:text-underline-style="solid" style:text-underline-width="auto" style:text-underline-color="font-color" officeooo:rsid="00a3cefc"/>
    </style:style>
    <style:style style:name="T207" style:family="text">
      <style:text-properties fo:font-style="normal" style:font-style-asian="normal" style:font-style-complex="normal"/>
    </style:style>
    <style:style style:name="T208" style:family="text">
      <style:text-properties fo:font-family="'Mono Uralic'" style:font-pitch="variable" fo:font-size="10pt" officeooo:rsid="01030bae" style:font-size-asian="10pt" style:font-size-complex="10pt"/>
    </style:style>
    <style:style style:name="T209" style:family="text">
      <style:text-properties officeooo:rsid="004503d2"/>
    </style:style>
    <style:style style:name="T210" style:family="text">
      <style:text-properties style:font-name="Liberation Mono" fo:font-size="10pt" officeooo:rsid="003a0ba8" style:font-size-asian="10pt" style:font-size-complex="10pt"/>
    </style:style>
    <style:style style:name="T211" style:family="text">
      <style:text-properties style:font-name="Liberation Mono" fo:font-size="10pt" officeooo:rsid="001599bc" style:font-size-asian="10pt" style:font-size-complex="10pt"/>
    </style:style>
    <style:style style:name="T212" style:family="text">
      <style:text-properties style:font-name="Liberation Mono" fo:font-size="10pt" officeooo:rsid="001c97ad" style:font-size-asian="10pt" style:font-size-complex="10pt"/>
    </style:style>
    <style:style style:name="T213" style:family="text">
      <style:text-properties officeooo:rsid="0042f2e5"/>
    </style:style>
    <style:style style:name="T214" style:family="text">
      <style:text-properties fo:font-weight="bold" officeooo:rsid="0042f2e5" style:font-weight-asian="bold" style:font-weight-complex="bold"/>
    </style:style>
    <style:style style:name="T215" style:family="text">
      <style:text-properties officeooo:rsid="00dff39c"/>
    </style:style>
    <style:style style:name="T216" style:family="text">
      <style:text-properties officeooo:rsid="0096d11e"/>
    </style:style>
    <style:style style:name="T217" style:family="text">
      <style:text-properties officeooo:rsid="00b61e23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officeooo:rsid="0098d15c"/>
    </style:style>
    <style:style style:name="T220" style:family="text">
      <style:text-properties officeooo:rsid="00a5b122"/>
    </style:style>
    <style:style style:name="T221" style:family="text">
      <style:text-properties fo:font-weight="bold" officeooo:rsid="009da9d7" style:font-weight-asian="bold" style:font-weight-complex="bold"/>
    </style:style>
    <style:style style:name="T222" style:family="text">
      <style:text-properties officeooo:rsid="009da9d7"/>
    </style:style>
    <style:style style:name="T223" style:family="text">
      <style:text-properties officeooo:rsid="00a7a615"/>
    </style:style>
    <style:style style:name="T224" style:family="text">
      <style:text-properties fo:font-weight="bold" officeooo:rsid="006acd40" style:font-weight-asian="bold" style:font-weight-complex="bold"/>
    </style:style>
    <style:style style:name="T225" style:family="text">
      <style:text-properties officeooo:rsid="006acd40"/>
    </style:style>
    <style:style style:name="T226" style:family="text">
      <style:text-properties officeooo:rsid="00691bc3"/>
    </style:style>
    <style:style style:name="T227" style:family="text">
      <style:text-properties style:text-underline-style="solid" style:text-underline-width="auto" style:text-underline-color="font-color"/>
    </style:style>
    <style:style style:name="T228" style:family="text">
      <style:text-properties officeooo:rsid="00f26115"/>
    </style:style>
    <style:style style:name="T229" style:family="text">
      <style:text-properties fo:font-family="'Font Awesome 7 Free Solid'" officeooo:rsid="00f26115" style:font-family-asian="'Font Awesome 7 Free Solid'" style:font-family-complex="'Font Awesome 7 Free Solid'"/>
    </style:style>
    <style:style style:name="T230" style:family="text">
      <style:text-properties style:font-name="Liberation Serif" officeooo:rsid="00714ce7" style:font-name-asian="WenQuanYi Micro Hei" style:font-name-complex="Noto Sans1"/>
    </style:style>
    <style:style style:name="T231" style:family="text">
      <style:text-properties fo:font-weight="bold" officeooo:rsid="00e4a5df" style:font-weight-asian="bold" style:font-weight-complex="bold"/>
    </style:style>
    <style:style style:name="T232" style:family="text">
      <style:text-properties officeooo:rsid="00f5c24d"/>
    </style:style>
    <style:style style:name="T233" style:family="text">
      <style:text-properties fo:font-weight="bold" officeooo:rsid="00efb69a" style:font-weight-asian="bold" style:font-weight-complex="bold"/>
    </style:style>
    <style:style style:name="T234" style:family="text">
      <style:text-properties officeooo:rsid="00efb69a"/>
    </style:style>
    <style:style style:name="T235" style:family="text">
      <style:text-properties fo:font-size="13pt" fo:font-weight="bold" style:font-size-asian="13pt" style:font-weight-asian="bold" style:font-size-complex="13pt" style:font-weight-complex="bold"/>
    </style:style>
    <style:style style:name="T236" style:family="text">
      <style:text-properties fo:font-size="13pt" style:font-size-asian="13pt" style:font-size-complex="13pt"/>
    </style:style>
    <style:style style:name="T237" style:family="text">
      <style:text-properties fo:font-weight="bold" officeooo:rsid="002ad3d5" style:font-weight-asian="bold" style:font-weight-complex="bold"/>
    </style:style>
    <style:style style:name="T238" style:family="text">
      <style:text-properties fo:font-weight="normal" officeooo:rsid="002ad3d5" style:font-weight-asian="normal" style:font-weight-complex="normal"/>
    </style:style>
    <style:style style:name="T239" style:family="text">
      <style:text-properties officeooo:rsid="001227dc"/>
    </style:style>
    <style:style style:name="T240" style:family="text">
      <style:text-properties officeooo:rsid="00d295f5"/>
    </style:style>
    <style:style style:name="T241" style:family="text">
      <style:text-properties officeooo:rsid="0106b376"/>
    </style:style>
    <style:style style:name="T242" style:family="text">
      <style:text-properties officeooo:rsid="00386d4c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1.8701in, 0.3598in, 0.15in, 1.0799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.0402in, 0.05in, 0.0201in, 0.5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.0799in, 0.5in, 0.0598in, 0.079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right" style:horizontal-rel="paragraph" style:mirror="none" fo:clip="rect(0in, 0in, 0in, 0.3402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right" style:horizontal-rel="paragraph" fo:padding-left="0.0598in" fo:padding-right="0in" fo:padding-top="0in" fo:padding-bottom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vertical-pos="from-top" style:vertical-rel="paragraph" style:horizontal-pos="right" style:horizontal-rel="paragraph" style:mirror="none" fo:clip="rect(0.1902in, 0.5201in, 1.9in, 0.5201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uetooth <text:span text:style-name="T1">devices </text:span>– <text:span text:style-name="T2">How </text:span><text:span text:style-name="T3">T</text:span><text:span text:style-name="T2">o</text:span></text:p>
      <text:p text:style-name="P2"/>
      <text:p text:style-name="P3"><text:a xlink:type="simple" xlink:href="http://electronics.howstuffworks.com/bluetooth.htm" text:style-name="Internet_20_link" text:visited-style-name="Visited_20_Internet_20_Link">Bluetooth</text:a> is a method for <text:span text:style-name="T4">moving</text:span> data over short distances using <text:span text:style-name="T4">wireless</text:span>. It is used for peripherals of all kinds: phones, audio equipment, keyboard, <text:span text:style-name="T4">and</text:span> m<text:span text:style-name="T4">ic</text:span>e. <text:span text:style-name="T4">Only coverage of </text:span><text:span text:style-name="T5">Cinnamon,</text:span><text:span text:style-name="T4"> Fluxbox, </text:span><text:span text:style-name="T5">Gnome, KDE and Xfce</text:span><text:span text:style-name="T4">.</text:span></text:p>
      <text:p text:style-name="P4"><text:span text:style-name="T6">For high-end audio B</text:span><text:span text:style-name="T7">luetooth</text:span><text:span text:style-name="T6"> </text:span><text:span text:style-name="T8">speakers and other </text:span><text:span text:style-name="T6">devices </text:span><text:span text:style-name="T9">see </text:span><text:span text:style-name="T8">th</text:span><text:span text:style-name="T9">is</text:span><text:span text:style-name="T6"> </text:span><text:a xlink:type="simple" xlink:href="https://en.wikipedia.org/wiki/List_of_Bluetooth_profiles#Advanced_Audio_Distribution_Profile_.28A2DP.29" text:style-name="Internet_20_link" text:visited-style-name="Visited_20_Internet_20_Link"><text:span text:style-name="T6">A2DP</text:span></text:a><text:span text:style-name="T6"> link. </text:span><text:span text:style-name="T10">To select a profile right-click on the device </text:span><text:span text:style-name="T9">then</text:span><text:span text:style-name="T10"> check 'Audio and input profiles'. Right-click again and hover over 'Audio Profile' and select </text:span><text:span text:style-name="T9">a</text:span><text:span text:style-name="T10"> profile. </text:span><text:span text:style-name="T9">The 'PulseAudio Volume Control' aka 'Audio mixer...' has the same selections on the 'Configuration' tab.</text:span></text:p>
      <text:p text:style-name="P5"><draw:frame draw:style-name="fr1" draw:name="Image8" text:anchor-type="paragraph" svg:x="2.9472in" svg:y="0.0126in" svg:width="4.5201in" svg:height="1.3598in" draw:z-index="4"><draw:image xlink:href="Pictures/10000000000002FF00000191343C876E.png" xlink:type="simple" xlink:show="embed" xlink:actuate="onLoad" draw:mime-type="image/png"/></draw:frame><text:span text:style-name="Strong_20_Emphasis"><text:span text:style-name="T11"/></text:span></text:p>
      <text:p text:style-name="P6"><text:span text:style-name="Strong_20_Emphasis"><text:span text:style-name="T12">NOTE</text:span></text:span><text:span text:style-name="Strong_20_Emphasis"><text:span text:style-name="T13">: The </text:span></text:span><text:span text:style-name="Strong_20_Emphasis"><text:span text:style-name="T14">Pairing and Trust </text:span></text:span><text:span text:style-name="Strong_20_Emphasis"><text:span text:style-name="T13">state of a given Bluetooth device </text:span></text:span><text:span text:style-name="Strong_20_Emphasis"><text:span text:style-name="T15">are the only ones that </text:span></text:span><text:span text:style-name="Strong_20_Emphasis"><text:span text:style-name="T14">persist through </text:span></text:span><text:span text:style-name="Strong_20_Emphasis"><text:span text:style-name="T13">PC </text:span></text:span><text:span text:style-name="Strong_20_Emphasis"><text:span text:style-name="T14">reboots. S</text:span></text:span><text:span text:style-name="Strong_20_Emphasis"><text:span text:style-name="T13">o, the s</text:span></text:span><text:span text:style-name="Strong_20_Emphasis"><text:span text:style-name="T14">ubsequent </text:span></text:span><text:span text:style-name="Strong_20_Emphasis"><text:span text:style-name="T13">usage of a </text:span></text:span><text:span text:style-name="Strong_20_Emphasis"><text:span text:style-name="T14">Bluetooth </text:span></text:span><text:span text:style-name="Strong_20_Emphasis"><text:span text:style-name="T13">device </text:span></text:span><text:span text:style-name="Strong_20_Emphasis"><text:span text:style-name="T14">only require</text:span></text:span><text:span text:style-name="Strong_20_Emphasis"><text:span text:style-name="T13">s</text:span></text:span><text:span text:style-name="Strong_20_Emphasis"><text:span text:style-name="T14"> </text:span></text:span><text:span text:style-name="Strong_20_Emphasis"><text:span text:style-name="T13">a </text:span></text:span><text:span text:style-name="Strong_20_Emphasis"><text:span text:style-name="T14">right-click '</text:span></text:span><text:span text:style-name="Strong_20_Emphasis"><text:span text:style-name="T16"></text:span></text:span><text:span text:style-name="Strong_20_Emphasis"><text:span text:style-name="T17"> </text:span></text:span><text:span text:style-name="Strong_20_Emphasis"><text:span text:style-name="T14">Connect' </text:span></text:span><text:span text:style-name="Strong_20_Emphasis"><text:span text:style-name="T13">for it to work</text:span></text:span><text:span text:style-name="Strong_20_Emphasis"><text:span text:style-name="T14">.</text:span></text:span></text:p>
      <text:p text:style-name="P6"><text:span text:style-name="Strong_20_Emphasis"><text:span text:style-name="T18"/></text:span></text:p>
      <text:h text:style-name="Heading_20_3" text:outline-level="3"><text:bookmark text:name="Pairing"/>Pairing <text:span text:style-name="T19">&amp; Connecting</text:span></text:h>
      <text:p text:style-name="P7">Some peripherals (keyboards, mice, etc.) link automatically. Others such as smart-phones and audio headsets, need to be <text:a xlink:type="simple" xlink:href="https://en.wikipedia.org/wiki/Bluetooth#Pairing_and_bonding" text:style-name="Internet_20_link" text:visited-style-name="Visited_20_Internet_20_Link">paired</text:a> <text:span text:style-name="T20">(&amp; connected if pairing does not)</text:span>. For security reasons, Bluetooth devices will only talk to each other if they have been "introduced" first, <text:span text:style-name="T21">aka</text:span> Pairing.</text:p>
      <text:p text:style-name="P7"><text:span text:style-name="T6">M</text:span>ak<text:span text:style-name="T6">e</text:span> sure the device you are interested in is discoverable <text:span text:style-name="T22">(pairing enabled). </text:span><text:span text:style-name="T23">Some</text:span><text:span text:style-name="T6"> </text:span><text:span text:style-name="T24">devices </text:span><text:span text:style-name="T6">require a special keypress to enter pairing mode.</text:span></text:p>
      <text:h text:style-name="Heading_20_3" text:outline-level="3"><text:span text:style-name="T5">Cinnamon, </text:span><text:span text:style-name="T25">F</text:span><text:span text:style-name="T26">luxbox </text:span><text:span text:style-name="T27">&amp; </text:span><text:span text:style-name="T5">Xfce</text:span></text:h>
      <text:p text:style-name="P8"><text:span text:style-name="T28">This section covers connection</text:span><text:span text:style-name="T29">s</text:span><text:span text:style-name="T28"> with the Blueman app that is </text:span><text:span text:style-name="T30"></text:span><text:span text:style-name="T28"> in the SysTray. </text:span><text:span text:style-name="T31">One time setup:</text:span></text:p>
      <text:list text:style-name="L1">
        <text:list-item>
          <text:p text:style-name="P9">From the <text:span text:style-name="T32">Start</text:span> Menu, type 'Blue' <text:span text:style-name="T33">in the search box </text:span>and <text:span text:style-name="T32">click</text:span> 'Bluetooth <text:span text:style-name="T34">Manager</text:span>'.</text:p>
        </text:list-item>
        <text:list-item>
          <text:p text:style-name="P9">Answer 'Yes' to the question: 'Shall Bluetooth get enabled automatically?'</text:p>
        </text:list-item>
        <text:list-item>
          <text:p text:style-name="P9"><text:span text:style-name="T34">Click 'Adapter' and</text:span> change the setting to: 'Always visible' and then X out of the p<text:span text:style-name="T34">o</text:span>p<text:span text:style-name="T34">up</text:span>.</text:p>
        </text:list-item>
      </text:list>
      <text:p text:style-name="P10"/>
      <text:p text:style-name="P11">Now you should have the <text:span text:style-name="T35">Bluetooth i</text:span>con <text:span text:style-name="T36"></text:span> in your <text:span text:style-name="T37">Sy</text:span>s<text:span text:style-name="T37">T</text:span>ray <text:span text:style-name="T38">(blueman-applet)</text:span>.</text:p>
      <text:p text:style-name="P10"/>
      <text:h text:style-name="Heading_20_4" text:outline-level="4">Connecting devices</text:h>
      <text:p text:style-name="P12"><text:span text:style-name="Strong_20_Emphasis"><text:span text:style-name="T39">Enable pairing and a</text:span></text:span><text:span text:style-name="Strong_20_Emphasis"><text:span text:style-name="T40">ct</text:span></text:span><text:span text:style-name="Strong_20_Emphasis"><text:span text:style-name="T41"> quickly</text:span></text:span><text:span text:style-name="Strong_20_Emphasis"><text:span text:style-name="T42">, as pa</text:span></text:span><text:span text:style-name="Strong_20_Emphasis"><text:span text:style-name="T43">iring</text:span></text:span><text:span text:style-name="Strong_20_Emphasis"><text:span text:style-name="T42"> </text:span></text:span><text:span text:style-name="Strong_20_Emphasis"><text:span text:style-name="T44">may</text:span></text:span><text:span text:style-name="Strong_20_Emphasis"><text:span text:style-name="T45"> </text:span></text:span><text:span text:style-name="Strong_20_Emphasis"><text:span text:style-name="T42">ha</text:span></text:span><text:span text:style-name="Strong_20_Emphasis"><text:span text:style-name="T45">ve</text:span></text:span><text:span text:style-name="Strong_20_Emphasis"><text:span text:style-name="T42"> a </text:span></text:span><text:span text:style-name="Strong_20_Emphasis"><text:span text:style-name="T46">relatively </text:span></text:span><text:span text:style-name="Strong_20_Emphasis"><text:span text:style-name="T42">short time-out period, </text:span></text:span><text:span text:style-name="Strong_20_Emphasis"><text:span text:style-name="T45">so</text:span></text:span><text:span text:style-name="Strong_20_Emphasis"><text:span text:style-name="T47">metimes</text:span></text:span><text:span text:style-name="Strong_20_Emphasis"><text:span text:style-name="T45"> </text:span></text:span><text:span text:style-name="Strong_20_Emphasis"><text:span text:style-name="T42">10-second</text:span></text:span><text:span text:style-name="Strong_20_Emphasis"><text:span text:style-name="T45">s.</text:span></text:span></text:p>
      <text:p text:style-name="P12"><text:span text:style-name="Strong_20_Emphasis"><text:span text:style-name="T48"/></text:span></text:p>
      <text:list xml:id="list2836746802" text:style-name="L2">
        <text:list-item>
          <text:p text:style-name="P13"><text:span text:style-name="T49">C</text:span><text:span text:style-name="T6">lick the </text:span><text:span text:style-name="T50">Bluetooth </text:span><text:span text:style-name="T6">icon </text:span><text:span text:style-name="T36"></text:span><text:span text:style-name="T51"> </text:span><text:span text:style-name="T52">and the Blueman app will open.</text:span></text:p>
        </text:list-item>
        <text:list-item>
          <text:p text:style-name="P14">Click '<text:span text:style-name="T53"></text:span><text:span text:style-name="T54"> </text:span><text:span text:style-name="Strong_20_Emphasis"><text:span text:style-name="T22">S</text:span></text:span><text:span text:style-name="Strong_20_Emphasis"><text:span text:style-name="T55">e</text:span></text:span><text:span text:style-name="Strong_20_Emphasis">a</text:span><text:span text:style-name="Strong_20_Emphasis"><text:span text:style-name="T55">rch'</text:span></text:span> to find devices.</text:p>
        </text:list-item>
        <text:list-item>
          <text:p text:style-name="P14">Highlight the <text:span text:style-name="T56">desired </text:span>device and click the <text:span text:style-name="T57">Trust icon</text:span><text:span text:style-name="Strong_20_Emphasis"><text:span text:style-name="T22"> </text:span></text:span><draw:frame draw:style-name="fr2" draw:name="Image6" text:anchor-type="as-char" svg:width="0.15in" svg:height="0.1402in" draw:z-index="9"><draw:image xlink:href="Pictures/1000000000000048000000205EC1FEF7.jpg" xlink:type="simple" xlink:show="embed" xlink:actuate="onLoad" draw:mime-type="image/jpeg"/></draw:frame><text:s/><text:span text:style-name="T49">in the toolbar</text:span><text:span text:style-name="T22">.</text:span></text:p>
        </text:list-item>
        <text:list-item>
          <text:p text:style-name="P15"><text:span text:style-name="T22">Click the </text:span><text:span text:style-name="T57">Pair icon</text:span><text:span text:style-name="Strong_20_Emphasis"><text:span text:style-name="T22"> </text:span></text:span><draw:frame draw:style-name="fr3" draw:name="Image5" text:anchor-type="as-char" svg:width="0.1799in" svg:height="0.1299in" draw:z-index="2"><draw:image xlink:href="Pictures/1000000000000048000000205EC1FEF7.jpg" xlink:type="simple" xlink:show="embed" xlink:actuate="onLoad" draw:mime-type="image/jpeg"/></draw:frame><text:span text:style-name="Strong_20_Emphasis"><text:span text:style-name="T58"><text:s/></text:span></text:span><text:span text:style-name="Strong_20_Emphasis"><text:span text:style-name="T59">i</text:span></text:span><text:span text:style-name="Strong_20_Emphasis"><text:span text:style-name="T60">n the toolbar</text:span></text:span><text:span text:style-name="Strong_20_Emphasis"><text:span text:style-name="T61">. </text:span></text:span><text:span text:style-name="Strong_20_Emphasis"><text:span text:style-name="T62">FYI: </text:span></text:span><text:span text:style-name="Strong_20_Emphasis"><text:span text:style-name="T63">m</text:span></text:span><text:span text:style-name="Strong_20_Emphasis"><text:span text:style-name="T64">ost</text:span></text:span><text:span text:style-name="Strong_20_Emphasis"><text:span text:style-name="T62"> devices will connect at this point.</text:span></text:span><text:span text:style-name="Strong_20_Emphasis"><text:span text:style-name="T65"> This is normal.</text:span></text:span></text:p>
        </text:list-item>
        <text:list-item>
          <text:p text:style-name="P16"><text:span text:style-name="Strong_20_Emphasis"><text:span text:style-name="T39">Double-click the device</text:span></text:span><text:span text:style-name="Strong_20_Emphasis"><text:span text:style-name="T47">. It should connect and send a short beep sound through the connection.</text:span></text:span></text:p>
        </text:list-item>
      </text:list>
      <text:p text:style-name="P17"><text:span text:style-name="Strong_20_Emphasis"><text:span text:style-name="T66"/></text:span></text:p>
      <text:p text:style-name="P17"><text:span text:style-name="Strong_20_Emphasis"><text:span text:style-name="T59">Occasionally a device </text:span></text:span><text:span text:style-name="Strong_20_Emphasis"><text:span text:style-name="T42">will </text:span></text:span><text:span text:style-name="Strong_20_Emphasis"><text:span text:style-name="T59">NOT </text:span></text:span><text:span text:style-name="Strong_20_Emphasis"><text:span text:style-name="T67">stay connected</text:span></text:span><text:span text:style-name="Strong_20_Emphasis"><text:span text:style-name="T59">. </text:span></text:span><text:span text:style-name="Strong_20_Emphasis"><text:span text:style-name="T43">I</text:span></text:span><text:span text:style-name="Strong_20_Emphasis"><text:span text:style-name="T67">f so,</text:span></text:span><text:span text:style-name="Strong_20_Emphasis"><text:span text:style-name="T59"> right-click </text:span></text:span><text:span text:style-name="Strong_20_Emphasis"><text:span text:style-name="T68">on </text:span></text:span><text:span text:style-name="Strong_20_Emphasis"><text:span text:style-name="T59">the device and </text:span></text:span><text:span text:style-name="Strong_20_Emphasis"><text:span text:style-name="T67">then </text:span></text:span><text:span text:style-name="Strong_20_Emphasis"><text:span text:style-name="T59">left-click </text:span></text:span><text:span text:style-name="Strong_20_Emphasis"><text:span text:style-name="T69"></text:span></text:span><text:span text:style-name="Strong_20_Emphasis"><text:span text:style-name="T70"> </text:span></text:span><text:span text:style-name="Strong_20_Emphasis"><text:span text:style-name="T59">Connect'</text:span></text:span></text:p>
      <text:h text:style-name="P18" text:outline-level="4"><draw:frame draw:style-name="fr4" draw:name="Image1" text:anchor-type="paragraph" svg:y="0.1402in" svg:width="2.8598in" svg:height="1.85in" draw:z-index="0"><draw:image xlink:href="Pictures/100000000000029100000196A7477841.jpg" xlink:type="simple" xlink:show="embed" xlink:actuate="onLoad" draw:mime-type="image/jpeg"/></draw:frame><text:soft-page-break/><text:span text:style-name="Strong_20_Emphasis"><text:span text:style-name="T71">Se</text:span></text:span><text:span text:style-name="Strong_20_Emphasis"><text:span text:style-name="T72">tting</text:span></text:span><text:span text:style-name="Strong_20_Emphasis"><text:span text:style-name="T71"> </text:span></text:span><text:span text:style-name="Strong_20_Emphasis"><text:span text:style-name="T73">the </text:span></text:span><text:span text:style-name="Strong_20_Emphasis"><text:span text:style-name="T74">sound profile</text:span></text:span><text:span text:style-name="Strong_20_Emphasis"><text:span text:style-name="T71"> -</text:span></text:span><text:span text:style-name="Strong_20_Emphasis"><text:span text:style-name="T75"> Xfce</text:span></text:span></text:h>
      <text:p text:style-name="P19"><text:span text:style-name="Strong_20_Emphasis"><text:span text:style-name="T76">Left-click the speaker icon </text:span></text:span><text:span text:style-name="Strong_20_Emphasis"><text:span text:style-name="T77">in the System Tray</text:span></text:span><text:span text:style-name="Strong_20_Emphasis"><text:span text:style-name="T76">.</text:span></text:span></text:p>
      <text:p text:style-name="P20"><text:span text:style-name="Strong_20_Emphasis"><text:span text:style-name="T76">Left-click the right facing arrow </text:span></text:span><text:span text:style-name="Strong_20_Emphasis"><text:span text:style-name="T78"></text:span></text:span><text:span text:style-name="Strong_20_Emphasis"><text:span text:style-name="T79"> </text:span></text:span><text:span text:style-name="Strong_20_Emphasis"><text:span text:style-name="T80">in the blue bar </text:span></text:span><text:span text:style-name="Strong_20_Emphasis"><text:span text:style-name="T81">(1)</text:span></text:span><text:span text:style-name="Strong_20_Emphasis"><text:span text:style-name="T76">.</text:span></text:span></text:p>
      <text:p text:style-name="P20"><text:span text:style-name="Strong_20_Emphasis"><text:span text:style-name="T76">A fly-out menu results </text:span></text:span><text:span text:style-name="Strong_20_Emphasis"><text:span text:style-name="T81">(2)</text:span></text:span><text:span text:style-name="Strong_20_Emphasis"><text:span text:style-name="T76">. </text:span></text:span><text:span text:style-name="Strong_20_Emphasis"><text:span text:style-name="T82">Select</text:span></text:span><text:span text:style-name="Strong_20_Emphasis"><text:span text:style-name="T77"> the desired device.</text:span></text:span></text:p>
      <text:p text:style-name="P21"><text:span text:style-name="Strong_20_Emphasis"><text:span text:style-name="T83">Note</text:span></text:span><text:span text:style-name="Strong_20_Emphasis"><text:span text:style-name="T82">: the </text:span></text:span><text:span text:style-name="Strong_20_Emphasis"><text:span text:style-name="T77">blue highlighted</text:span></text:span><text:span text:style-name="Strong_20_Emphasis"><text:span text:style-name="T76"> '</text:span></text:span><text:span text:style-name="Strong_20_Emphasis"><text:span text:style-name="T77">HD 4.50BTNC' </text:span></text:span><text:span text:style-name="Strong_20_Emphasis"><text:span text:style-name="T82">is not yet selected</text:span></text:span><text:span text:style-name="Strong_20_Emphasis"><text:span text:style-name="T76">.</text:span></text:span></text:p>
      <text:p text:style-name="P19"><text:span text:style-name="Strong_20_Emphasis"><text:span text:style-name="T77">Other </text:span></text:span><text:span text:style-name="Strong_20_Emphasis"><text:span text:style-name="T76">device</text:span></text:span><text:span text:style-name="Strong_20_Emphasis"><text:span text:style-name="T81">s</text:span></text:span><text:span text:style-name="Strong_20_Emphasis"><text:span text:style-name="T76"> </text:span></text:span><text:span text:style-name="Strong_20_Emphasis"><text:span text:style-name="T81">wi</text:span></text:span><text:span text:style-name="Strong_20_Emphasis"><text:span text:style-name="T76">ll </text:span></text:span><text:span text:style-name="Strong_20_Emphasis"><text:span text:style-name="T84">b</text:span></text:span><text:span text:style-name="Strong_20_Emphasis"><text:span text:style-name="T76">e</text:span></text:span><text:span text:style-name="Strong_20_Emphasis"><text:span text:style-name="T82"> list</text:span></text:span><text:span text:style-name="Strong_20_Emphasis"><text:span text:style-name="T84">ed below</text:span></text:span><text:span text:style-name="Strong_20_Emphasis"><text:span text:style-name="T77"> </text:span></text:span><text:span text:style-name="Strong_20_Emphasis"><text:span text:style-name="T84">it </text:span></text:span><text:span text:style-name="Strong_20_Emphasis"><text:span text:style-name="T76">as </text:span></text:span><text:span text:style-name="Strong_20_Emphasis"><text:span text:style-name="T85">more </text:span></text:span><text:span text:style-name="Strong_20_Emphasis"><text:span text:style-name="T76">choice</text:span></text:span><text:span text:style-name="Strong_20_Emphasis"><text:span text:style-name="T80">s </text:span></text:span><text:span text:style-name="Strong_20_Emphasis"><text:span text:style-name="T77">(2)</text:span></text:span><text:span text:style-name="Strong_20_Emphasis"><text:span text:style-name="T76">.</text:span></text:span></text:p>
      <text:p text:style-name="P19"><text:span text:style-name="Strong_20_Emphasis"><text:span text:style-name="T86"/></text:span></text:p>
      <text:p text:style-name="P22"><text:span text:style-name="Strong_20_Emphasis"><text:span text:style-name="T87">Reconnecting </text:span></text:span><text:span text:style-name="Strong_20_Emphasis"><text:span text:style-name="T88">devices</text:span></text:span></text:p>
      <text:p text:style-name="P22"><draw:frame draw:style-name="fr5" draw:name="Image9" text:anchor-type="paragraph" svg:y="0.1098in" svg:width="1.75in" svg:height="0.7201in" draw:z-index="5"><draw:image xlink:href="Pictures/10000000000001540000008D09F0A259.png" xlink:type="simple" xlink:show="embed" xlink:actuate="onLoad" draw:mime-type="image/png"/></draw:frame><text:span text:style-name="Strong_20_Emphasis"><text:span text:style-name="T89">Starting with MX Linux 25 </text:span></text:span><text:span text:style-name="Strong_20_Emphasis"><text:span text:style-name="T90">Xfce </text:span></text:span><text:span text:style-name="Strong_20_Emphasis"><text:span text:style-name="T89">a '</text:span></text:span><text:span text:style-name="Strong_20_Emphasis"><text:span text:style-name="T91">Bluetooth Authentication'</text:span></text:span><text:span text:style-name="Strong_20_Emphasis"><text:span text:style-name="T89"> popup appears when you power </text:span></text:span><text:span text:style-name="Strong_20_Emphasis"><text:span text:style-name="T91">on </text:span></text:span><text:span text:style-name="Strong_20_Emphasis"><text:span text:style-name="T89">a </text:span></text:span><text:span text:style-name="Strong_20_Emphasis"><text:span text:style-name="T91">previously connected </text:span></text:span><text:span text:style-name="Strong_20_Emphasis"><text:span text:style-name="T90">Bluetooth </text:span></text:span><text:span text:style-name="Strong_20_Emphasis"><text:span text:style-name="T89">device when in range. </text:span></text:span><text:span text:style-name="Strong_20_Emphasis"><text:span text:style-name="T91">FYI - </text:span></text:span><text:span text:style-name="Strong_20_Emphasis"><text:span text:style-name="T89">Pairing and Trust are persistent on </text:span></text:span><text:span text:style-name="Strong_20_Emphasis"><text:span text:style-name="T91">Linux</text:span></text:span><text:span text:style-name="Strong_20_Emphasis"><text:span text:style-name="T89"> installations. </text:span></text:span><text:span text:style-name="Strong_20_Emphasis"><text:span text:style-name="T91">If </text:span></text:span><text:span text:style-name="Strong_20_Emphasis"><text:span text:style-name="T90">you choose </text:span></text:span><text:span text:style-name="Strong_20_Emphasis"><text:span text:style-name="T91">'Always Accept' the device will finish connecting on its own </text:span></text:span><text:span text:style-name="Strong_20_Emphasis"><text:span text:style-name="T90">for the next</text:span></text:span><text:span text:style-name="Strong_20_Emphasis"><text:span text:style-name="T91"> power on.</text:span></text:span></text:p>
      <text:p text:style-name="P22"><text:span text:style-name="Strong_20_Emphasis"><text:span text:style-name="T89"/></text:span></text:p>
      <text:h text:style-name="Heading_20_3" text:outline-level="3"><text:span text:style-name="Strong_20_Emphasis">KDE – </text:span><text:span text:style-name="Strong_20_Emphasis"><text:span text:style-name="T56">P</text:span></text:span><text:span text:style-name="Strong_20_Emphasis"><text:span text:style-name="T92">lasma</text:span></text:span></text:h>
      <text:p text:style-name="P23"><text:span text:style-name="Strong_20_Emphasis"><text:span text:style-name="T93">Right-click the Bluetooth icon </text:span></text:span><text:span text:style-name="Strong_20_Emphasis"><text:span text:style-name="T94"></text:span></text:span><text:span text:style-name="Strong_20_Emphasis"><text:span text:style-name="T95"> </text:span></text:span><text:span text:style-name="Strong_20_Emphasis"><text:span text:style-name="T79">in the SysTray </text:span></text:span><text:span text:style-name="Strong_20_Emphasis"><text:span text:style-name="T93">and verify that 'Enable bluetooth' is checked.</text:span></text:span></text:p>
      <text:p text:style-name="P24"><draw:frame draw:style-name="fr6" draw:name="Image2" text:anchor-type="paragraph" svg:x="4.8752in" svg:y="0.0701in" svg:width="2in" svg:height="1.4201in" draw:z-index="3"><draw:image xlink:href="Pictures/10000001000001F400000164B8B271B9.png" xlink:type="simple" xlink:show="embed" xlink:actuate="onLoad" draw:mime-type="image/png"/></draw:frame><text:span text:style-name="Strong_20_Emphasis"><text:span text:style-name="T96"/></text:span></text:p>
      <text:p text:style-name="P24"><text:span text:style-name="Strong_20_Emphasis"><text:span text:style-name="T97">To a</text:span></text:span><text:span text:style-name="Strong_20_Emphasis"><text:span text:style-name="T98">dd </text:span></text:span><text:span text:style-name="Strong_20_Emphasis"><text:span text:style-name="T97">a n</text:span></text:span><text:span text:style-name="Strong_20_Emphasis"><text:span text:style-name="T98">ew </text:span></text:span><text:span text:style-name="Strong_20_Emphasis"><text:span text:style-name="T97">d</text:span></text:span><text:span text:style-name="Strong_20_Emphasis"><text:span text:style-name="T98">evice:</text:span></text:span></text:p>
      <text:p text:style-name="P25"><text:span text:style-name="Strong_20_Emphasis"><text:span text:style-name="T99"/></text:span></text:p>
      <text:list text:continue-numbering="true" text:style-name="L2">
        <text:list-item>
          <text:p text:style-name="P26"><text:span text:style-name="T92">C</text:span><text:span text:style-name="T6">lick the </text:span><text:span text:style-name="T50">Bluetooth </text:span><text:span text:style-name="T6">icon </text:span><text:span text:style-name="T92">and c</text:span><text:span text:style-name="T20">lick</text:span> '<text:span text:style-name="T20">+ Add New </text:span><text:span text:style-name="T22">D</text:span>evice<text:span text:style-name="T22">…'</text:span></text:p>
          <text:p text:style-name="P27">A popup 'Select a device' will scan for Bluetooth peripherals.</text:p>
        </text:list-item>
        <text:list-item>
          <text:p text:style-name="P28">Highlight the <text:span text:style-name="T100">desired </text:span>device and click '<text:span text:style-name="T101">® </text:span><text:span text:style-name="T20">Next'</text:span><text:span text:style-name="T22">.</text:span></text:p>
        </text:list-item>
        <text:list-item>
          <text:p text:style-name="P29"><text:span text:style-name="Strong_20_Emphasis"><text:span text:style-name="T102">A 'Setup Finished' popup will appear.</text:span></text:span></text:p>
        </text:list-item>
      </text:list>
      <text:p text:style-name="P30"><text:span text:style-name="Strong_20_Emphasis"><text:span text:style-name="T103">If there are several Bluetooth devices in the area it may take several 10s of seconds for all to appear.</text:span></text:span></text:p>
      <text:p text:style-name="P31"><text:span text:style-name="Strong_20_Emphasis"><text:span text:style-name="T104"/></text:span></text:p>
      <text:h text:style-name="Heading_20_4" text:outline-level="4"><text:span text:style-name="Strong_20_Emphasis"><text:span text:style-name="T105">Changing the o</text:span></text:span><text:span text:style-name="Strong_20_Emphasis"><text:span text:style-name="T106">utput device</text:span></text:span></text:h>
      <text:p text:style-name="P32"><draw:frame draw:style-name="fr7" draw:name="Image3" text:anchor-type="paragraph" svg:y="-0.0098in" svg:width="2.5in" svg:height="1.1799in" draw:z-index="1"><draw:image xlink:href="Pictures/10000000000001B3000000CDFB5492B8.png" xlink:type="simple" xlink:show="embed" xlink:actuate="onLoad" draw:mime-type="image/png"/></draw:frame><text:span text:style-name="Strong_20_Emphasis"><text:span text:style-name="T107">C</text:span></text:span><text:span text:style-name="Strong_20_Emphasis"><text:span text:style-name="T108">lick the speaker icon. </text:span></text:span><text:span text:style-name="Strong_20_Emphasis"><text:span text:style-name="T109">A</text:span></text:span><text:span text:style-name="Strong_20_Emphasis"><text:span text:style-name="T108"> pop-up will allow device selection. </text:span></text:span><text:span text:style-name="Strong_20_Emphasis"><text:span text:style-name="T110">At right</text:span></text:span><text:span text:style-name="Strong_20_Emphasis"><text:span text:style-name="T107"> shows 'Speakers' and 'Mini H2O' </text:span></text:span><text:span text:style-name="Strong_20_Emphasis"><text:span text:style-name="T110">as choices</text:span></text:span><text:span text:style-name="Strong_20_Emphasis"><text:span text:style-name="T107">.</text:span></text:span></text:p>
      <text:p text:style-name="P33"><text:span text:style-name="Strong_20_Emphasis"><text:span text:style-name="T111"/></text:span></text:p>
      <text:p text:style-name="P34"><text:span text:style-name="Strong_20_Emphasis"><text:span text:style-name="T42">Occasionally KDE will refuse to re-connect to a previously </text:span></text:span><text:span text:style-name="Strong_20_Emphasis"><text:span text:style-name="T112">us</text:span></text:span><text:span text:style-name="Strong_20_Emphasis"><text:span text:style-name="T42">ed device. </text:span></text:span><text:span text:style-name="Strong_20_Emphasis"><text:span text:style-name="T112">P</text:span></text:span><text:span text:style-name="Strong_20_Emphasis"><text:span text:style-name="T113">ower cycling </text:span></text:span><text:span text:style-name="Strong_20_Emphasis"><text:span text:style-name="T114">the device </text:span></text:span><text:span text:style-name="Strong_20_Emphasis"><text:span text:style-name="T112">usually </text:span></text:span><text:span text:style-name="Strong_20_Emphasis"><text:span text:style-name="T113">clears this. If not r</text:span></text:span><text:span text:style-name="Strong_20_Emphasis"><text:span text:style-name="T42">ight-click the Bluetooth icon, select '</text:span></text:span><text:span text:style-name="Strong_20_Emphasis"><text:span text:style-name="T115">Configure Bluetooth…' </text:span></text:span><text:span text:style-name="Strong_20_Emphasis"><text:span text:style-name="T116">then d</text:span></text:span><text:span text:style-name="Strong_20_Emphasis"><text:span text:style-name="T115">elete the device </text:span></text:span><text:span text:style-name="Strong_20_Emphasis"><text:span text:style-name="T117"></text:span></text:span><text:span text:style-name="Strong_20_Emphasis"><text:span text:style-name="T118"> </text:span></text:span><text:span text:style-name="Strong_20_Emphasis"><text:span text:style-name="T115">t</text:span></text:span><text:span text:style-name="Strong_20_Emphasis"><text:span text:style-name="T45">h</text:span></text:span><text:span text:style-name="Strong_20_Emphasis"><text:span text:style-name="T115">a</text:span></text:span><text:span text:style-name="Strong_20_Emphasis"><text:span text:style-name="T45">t i</text:span></text:span><text:span text:style-name="Strong_20_Emphasis"><text:span text:style-name="T115">s not connecting.</text:span></text:span></text:p>
      <text:p text:style-name="P35"><text:span text:style-name="Strong_20_Emphasis"><text:span text:style-name="T119"/></text:span></text:p>
      <text:p text:style-name="P36"><text:span text:style-name="Strong_20_Emphasis"><text:span text:style-name="T120">Other KDE settings - </text:span></text:span><text:span text:style-name="Strong_20_Emphasis"><text:span text:style-name="T109"><text:s/>right-click the Bluetooth icon and click Configure Bluetooth…'. </text:span></text:span><text:span text:style-name="Strong_20_Emphasis"><text:span text:style-name="T121">This is where you can delete stale devices and ones that fail to reconnect.</text:span></text:span></text:p>
      <text:p text:style-name="P37"/>
      <text:p text:style-name="P37"><draw:frame draw:style-name="fr8" draw:name="Image7" text:anchor-type="paragraph" svg:y="0.15in" svg:width="2in" svg:height="0.7902in" draw:z-index="7"><draw:image xlink:href="Pictures/10000000000001F4000001680F49C75C.png" xlink:type="simple" xlink:show="embed" xlink:actuate="onLoad" draw:mime-type="image/png"/></draw:frame><text:span text:style-name="T122">KDE – </text:span>PIN to allow connection <text:span text:style-name="T123">aka </text:span>Legacy Pairing:</text:p>
      <text:p text:style-name="P38"/>
      <text:p text:style-name="P39">If you're using an older Bluetooth device that do<text:span text:style-name="T124">es</text:span> n<text:span text:style-name="T125">o</text:span>t support Secure Simple Pairing (SSP), <text:span text:style-name="T124">it </text:span>might use Legacy Pairing, <text:span text:style-name="T125">th</text:span><text:span text:style-name="T124">ey</text:span> require a PIN <text:span text:style-name="T125">t</text:span>o connection. <text:span text:style-name="T126">T</text:span>here will be a <text:span text:style-name="T123">6-digit </text:span>suggested <text:span text:style-name="T123">PIN.</text:span></text:p>
      <text:p text:style-name="P40"/>
      <text:p text:style-name="P39"/>
      <text:p text:style-name="P41"><text:span text:style-name="T125">A</text:span>long <text:span text:style-name="T125">the</text:span> b<text:span text:style-name="T125">o</text:span>tto<text:span text:style-name="T125">m are two buttons where you can</text:span> confirm <text:span text:style-name="T125">the PIN either</text:span> '<text:span text:style-name="T127"></text:span><text:span text:style-name="T126">Matches' or '</text:span><text:span text:style-name="T127"> </text:span><text:span text:style-name="T126">Does not match' o</text:span>n the device.</text:p>
      <text:p text:style-name="P40"/>
      <text:p text:style-name="P42">If you can't find a specific PIN for your device, you can try using a generic PIN like "0000" or "1234". These are commonly used default PINs for many Bluetooth devices. <text:span text:style-name="T124">See devices maker's website for more.</text:span></text:p>
      <text:p text:style-name="P42"/>
      <text:h text:style-name="Heading_20_4" text:outline-level="4">Sound Profile</text:h>
      <text:p text:style-name="P43"/>
      <text:p text:style-name="P44"><text:span text:style-name="T128">From the</text:span> Start menu, Settings, Input &amp; Output, Sound. <text:span text:style-name="T128">C</text:span>hoose your Playback Device '<text:span text:style-name="T128">P</text:span>rofile:' with the <text:span text:style-name="T129"></text:span>.</text:p>
      <text:p text:style-name="P45"/>
      <text:p text:style-name="P45"><draw:frame draw:style-name="fr9" draw:name="Image10" text:anchor-type="paragraph" svg:width="3.5in" svg:height="1.1701in" draw:z-index="6"><draw:image xlink:href="Pictures/1000000100000296000000DEF233D1FB.png" xlink:type="simple" xlink:show="embed" xlink:actuate="onLoad" draw:mime-type="image/png"/></draw:frame></text:p>
      <text:h text:style-name="Heading_20_3" text:outline-level="3">Gnome – Ubuntu</text:h>
      <text:p text:style-name="P45"/>
      <text:p text:style-name="P46">At the top <text:span text:style-name="T34">right </text:span>click on the Network icon. In the Bluetooth area click the &gt; button. Click on 'Bluetooth Settings' to scan for devices. Click on desired device to connect. X out <text:span text:style-name="T38">to close window</text:span>.</text:p>
      <text:p text:style-name="P45"/>
      <text:h text:style-name="P47" text:outline-level="4">To remove a device</text:h>
      <text:p text:style-name="P45"/>
      <text:p text:style-name="P46">Go to 'Bluetooth Settings', click device <text:span text:style-name="T130">&amp;</text:span> then click 'Forget Device...' <text:span text:style-name="T130">O</text:span>n the confirmation popup click 'Forget'.</text:p>
      <text:p text:style-name="Standard"/>
      <text:h text:style-name="Heading_20_3" text:outline-level="3">PulseAudio Tweaks for Better Quality</text:h>
      <text:p text:style-name="P48">Edit ~/.config/pulse/default.pa (create if missing): Add load-module module-bluetooth-policy auto_switch=2 at the end. Restart Pulse: <text:span text:style-name="T131">pulseaudio -k &amp;&amp; pulseaudio –start</text:span> <text:span text:style-name="T132">then t</text:span>est with pavucontrol switch output device and profile manually.</text:p>
      <text:p text:style-name="P48"/>
      <text:h text:style-name="Heading_20_3" text:outline-level="3"><text:bookmark text:name="toc-Paragraph-49"/><text:bookmark-start text:name="__RefHeading___Toc18783_2274678380"/>Object <text:span text:style-name="T133">(file) </text:span><text:span text:style-name="T134">T</text:span>ransfer<text:bookmark-end text:name="__RefHeading___Toc18783_2274678380"/></text:h>
      <text:p text:style-name="P49">To be able to pass objects (documents, photos, etc.) back and forth between an MX Linux and a device using <text:span text:style-name="T135">B</text:span>luetooth. <text:span text:style-name="T136">F</text:span><text:span text:style-name="T6">irst c</text:span>onfirm that the phone and <text:span text:style-name="T137">PC</text:span> have <text:span text:style-name="T138">B</text:span>luetooth enabled and are visible.</text:p>
      <text:p text:style-name="P49"><text:span text:style-name="T139">Note</text:span><text:span text:style-name="T140">: Install t</text:span><text:span text:style-name="T141">he file '</text:span><text:span text:style-name="T142">bluez-obexd'</text:span><text:span text:style-name="T141"> </text:span><text:span text:style-name="T140">(</text:span><text:span text:style-name="T143">Object Exchange daemon for sharing content</text:span><text:span text:style-name="T140">)</text:span><text:span text:style-name="T143"> </text:span><text:span text:style-name="T140">as it</text:span><text:span text:style-name="T142"> </text:span><text:span text:style-name="T144">is</text:span><text:span text:style-name="T141"> needed.</text:span></text:p>
      <text:p text:style-name="P50"><text:span text:style-name="T6">To s</text:span>end <text:span text:style-name="T6">a </text:span>file:</text:p>
      <text:list text:style-name="L3">
        <text:list-item>
          <text:p text:style-name="P51"><text:span text:style-name="T145">Right-click the Bluetooth icon in the Notification Area &gt; '</text:span><text:span text:style-name="T146">®</text:span><text:span text:style-name="T145">Send Files to Device…'</text:span></text:p>
        </text:list-item>
        <text:list-item>
          <text:p text:style-name="P52">On the cell-phone: follow the appropriate on screen instructions for your device.</text:p>
        </text:list-item>
        <text:list-item>
          <text:p text:style-name="P52">Keep your eye on the receiving device to confirm acceptance of the object being transferred.</text:p>
        </text:list-item>
      </text:list>
      <text:p text:style-name="P53"/>
      <text:h text:style-name="Heading_20_3" text:outline-level="3"><text:bookmark text:name="Tethering"/>Tethering <text:span text:style-name="T147">with Bluetooth</text:span></text:h>
      <text:p text:style-name="P54">Tethering or <text:span text:style-name="T31">phone-as-modem (PAM)</text:span> is the sharing of a mobile device's cellular data connection with other connected computers. <text:span text:style-name="T148">M</text:span><text:span text:style-name="T149">ost </text:span><text:span text:style-name="T150">mobile carriers charge extra for tethering; </text:span><text:span text:style-name="T151">as </text:span><text:span text:style-name="T149">i</text:span><text:span text:style-name="T152">t </text:span><text:span text:style-name="T153">us</text:span><text:span text:style-name="T149">es</text:span><text:span text:style-name="T153"> </text:span><text:span text:style-name="T149">a large</text:span><text:span text:style-name="T153"> amount of data</text:span><text:span text:style-name="T150">. </text:span><text:span text:style-name="T149">Check</text:span><text:span text:style-name="T153"> your </text:span><text:span text:style-name="T149">cell </text:span><text:span text:style-name="T152">plan</text:span><text:span text:style-name="T153">. </text:span><text:span text:style-name="T154">More </text:span>on using Bluetooth <text:span text:style-name="T7">Devices </text:span>to a <text:span text:style-name="T7">cell-</text:span>phone as an <text:span text:style-name="T7">I</text:span>nternet <text:span text:style-name="T7">A</text:span>ccess <text:span text:style-name="T7">P</text:span>oint <text:span text:style-name="T154">here</text:span> <text:a xlink:type="simple" xlink:href="https://en.wikipedia.org/wiki/Tethering" text:style-name="Internet_20_link" text:visited-style-name="Visited_20_Internet_20_Link">tethering</text:a>.</text:p>
      <text:p text:style-name="P55"/>
      <text:h text:style-name="Heading_20_3" text:outline-level="3"><text:soft-page-break/><text:span text:style-name="T155">Bluetooth t</text:span>roubleshooting</text:h>
      <text:p text:style-name="P56"><text:span text:style-name="T156">M</text:span>ake sure Bluetooth is actually turned on for both <text:span text:style-name="T156">the </text:span>device <text:span text:style-name="T156">and in the Blueman app (</text:span><text:span text:style-name="T157">if present</text:span><text:span text:style-name="T156">)</text:span>. It’s easy<text:span text:style-name="T156"> to </text:span>overlook. <text:span text:style-name="T157">Some devices power off when the battery is low. Bluetooth is short range, </text:span><text:span text:style-name="T158">less than</text:span><text:span text:style-name="T157"> 30 f</text:span><text:span text:style-name="T158">ee</text:span><text:span text:style-name="T157">t (10 </text:span><text:span text:style-name="T158">m</text:span><text:span text:style-name="T157">).</text:span></text:p>
      <text:p text:style-name="P56"/>
      <text:p text:style-name="P56">There are some <text:span text:style-name="T159">Bluetooth devices</text:span> which will only pair to one <text:span text:style-name="T159">phone </text:span><text:span text:style-name="T160">or PC</text:span> at a time <text:span text:style-name="T161">(they store an address internally)</text:span>. <text:span text:style-name="T159">F</text:span>or those devices, <text:span text:style-name="T160">unpair AND </text:span>disconnect them from the <text:span text:style-name="T161">currently connected </text:span><text:span text:style-name="T160">phone or PC</text:span><text:span text:style-name="T159">.</text:span></text:p>
      <text:p text:style-name="P56"/>
      <text:p text:style-name="P57">Powering off a Bluetooth devices after disconnection has shown to make new connections more successful.</text:p>
      <text:p text:style-name="P56"/>
      <text:p text:style-name="P58">PulseAudio or PipeWire does n<text:span text:style-name="T161">o</text:span>t always auto-switch profiles smoothly. If <text:span text:style-name="T159">the profile </text:span>is grayed out, run:</text:p>
      <text:p text:style-name="P59"/>
      <text:p text:style-name="P60"><text:span text:style-name="T131">pactl set-card-profile bluez_card.XX_XX_XX_XX_XX_XX a2dp_sink</text:span> </text:p>
      <text:p text:style-name="P59"/>
      <text:p text:style-name="P58"><text:span text:style-name="T159">R</text:span>eplace <text:span text:style-name="T161">the </text:span>XX<text:span text:style-name="T161">s</text:span> with your device's MAC from <text:span text:style-name="T162">right-click info </text:span><text:span text:style-name="T163">Address:</text:span>.</text:p>
      <text:p text:style-name="P61"/>
      <text:p text:style-name="P61"><text:span text:style-name="T164">Be a</text:span>ware that <text:span text:style-name="T165">certain Broadcom binaries </text:span>can <text:span text:style-name="T165">no</text:span>t be distributed through the Debian repositories. Please see GitHub: winterheart - <text:a xlink:type="simple" xlink:href="https://github.com/winterheart/broadcom-bt-firmware?tab=readme-ov-file#broadcom-bluetooth-firmware-for-linux-kernel" text:style-name="Internet_20_link" text:visited-style-name="Visited_20_Internet_20_Link">Broadcom Bluetooth firmware for Linux kernel</text:a>.</text:p>
      <text:p text:style-name="P61"/>
      <text:p text:style-name="P61">Some recent <text:span text:style-name="T166">(</text:span><text:span text:style-name="T167">Bluetooth </text:span><text:span text:style-name="T168">6</text:span><text:span text:style-name="T166">.x) </text:span>dongles may not yet have drivers in the kernel and thus will not be <text:span text:style-name="T167">fully </text:span>recognized <text:span text:style-name="T167">(partial service listings)</text:span>. The most likely solution is to upgrade the kernel. <text:span text:style-name="T169">The </text:span><text:span text:style-name="Source_20_Text"><text:span text:style-name="T170">hciconfig </text:span></text:span><text:span text:style-name="Source_20_Text"><text:span text:style-name="T171">and</text:span></text:span><text:span text:style-name="Source_20_Text"><text:span text:style-name="T172"> hcitool</text:span></text:span><text:span text:style-name="Source_20_Text"><text:span text:style-name="T173"> </text:span></text:span><text:span text:style-name="Source_20_Text"><text:span text:style-name="T140">(</text:span></text:span><text:span text:style-name="T169">co</text:span>mmand line<text:span text:style-name="T140">) terminal </text:span>tool<text:span text:style-name="T169">s</text:span> can be helpful when problems arise.</text:p>
      <text:p text:style-name="P62"/>
      <text:list text:style-name="L4">
        <text:list-item>
          <text:p text:style-name="P63">To check if <text:span text:style-name="T174">the</text:span> Blue<text:span text:style-name="T174">tooth </text:span>daemon is ru<text:span text:style-name="T161">n</text:span>ning <text:span text:style-name="T174">check in MX Service Manager</text:span></text:p>
        </text:list-item>
      </text:list>
      <text:list text:style-name="L5">
        <text:list-item>
          <text:p text:style-name="P64">To check that your BT device is present and working:<text:tab/><text:span text:style-name="Emphasis">hcitool dev </text:span><text:span text:style-name="Emphasis"><text:span text:style-name="T175">hci0</text:span></text:span></text:p>
        </text:list-item>
      </text:list>
      <text:p text:style-name="P65">For similar tools, consult the man page for hcitool <text:span text:style-name="T176">(or use 'hcitool -h' for a summary).</text:span></text:p>
      <text:list text:style-name="L6">
        <text:list-item>
          <text:p text:style-name="P66">If the applet is not in the Notification Area:<text:tab/><text:tab/><text:span text:style-name="Emphasis">blueman-applet</text:span></text:p>
        </text:list-item>
      </text:list>
      <text:list text:style-name="L7">
        <text:list-item>
          <text:p text:style-name="P67">If Bluetooth Manager does not seem to start:<text:tab/><text:span text:style-name="Emphasis"><text:span text:style-name="T145">blueman-manager</text:span></text:span></text:p>
        </text:list-item>
      </text:list>
      <text:p text:style-name="P68"><text:span text:style-name="Emphasis"><text:span text:style-name="T177">From Quick System Info app</text:span></text:span><text:span text:style-name="Emphasis"><text:span text:style-name="T178"> or i</text:span></text:span><text:span text:style-name="Emphasis"><text:span text:style-name="T179">n terminal run inxi -Exxxz. </text:span></text:span><text:span text:style-name="Emphasis"><text:span text:style-name="T180">A</text:span></text:span><text:span text:style-name="Emphasis"><text:span text:style-name="T181">n example output below.</text:span></text:span></text:p>
      <text:p text:style-name="P69"><text:span text:style-name="Emphasis"><text:span text:style-name="T182">Bluetooth:</text:span></text:span></text:p>
      <text:p text:style-name="P69"><text:span text:style-name="Emphasis"><text:span text:style-name="T182">Device-1: Plugable Bluetooth 5.0 Adapter type: USB </text:span></text:span><text:span text:style-name="Emphasis"><text:span text:style-name="T183">driver</text:span></text:span><text:span text:style-name="Emphasis"><text:span text:style-name="T182">: btusb v: 0.8</text:span></text:span></text:p>
      <text:p text:style-name="P69"><text:span text:style-name="Emphasis"><text:span text:style-name="T182">bus-ID: 2-1.4:4 chip-ID: 2230:0016 class-ID: e001 serial: </text:span></text:span></text:p>
      <text:p text:style-name="P70"><text:span text:style-name="Emphasis"><text:span text:style-name="T182">Report: hciconfig ID: hci0 rfk-id: 1 </text:span></text:span><text:span text:style-name="Emphasis"><text:span text:style-name="T183">state</text:span></text:span><text:span text:style-name="Emphasis"><text:span text:style-name="T182">: up </text:span></text:span><text:span text:style-name="Emphasis"><text:span text:style-name="T183">rfk-block</text:span></text:span><text:span text:style-name="Emphasis"><text:span text:style-name="T182">: hardware: no</text:span></text:span></text:p>
      <text:p text:style-name="P70"><text:span text:style-name="Emphasis"><text:span text:style-name="T183">software: yes</text:span></text:span><text:span text:style-name="Emphasis"><text:span text:style-name="T182"> address: by-v: 3.0 lmp-v: 5.1 sub-v: 8761 hci-v: 5.1 rev: b</text:span></text:span></text:p>
      <text:p text:style-name="P71"><text:span text:style-name="Emphasis"><text:span text:style-name="T184"/></text:span></text:p>
      <text:p text:style-name="P72"><text:span text:style-name="Emphasis"><text:span text:style-name="T185">Notable info above</text:span></text:span><text:span text:style-name="Emphasis"><text:span text:style-name="T181">: </text:span></text:span></text:p>
      <text:list text:style-name="L8">
        <text:list-item>
          <text:p text:style-name="P73"><text:span text:style-name="Emphasis"><text:span text:style-name="T186">the</text:span></text:span><text:span text:style-name="Emphasis"><text:span text:style-name="T181"> '</text:span></text:span><text:span text:style-name="Emphasis"><text:span text:style-name="T187">d</text:span></text:span><text:span text:style-name="Emphasis"><text:span text:style-name="T185">river</text:span></text:span><text:span text:style-name="Emphasis"><text:span text:style-name="T181">: btusb' </text:span></text:span><text:span text:style-name="Emphasis"><text:span text:style-name="T186">has a value, </text:span></text:span><text:span text:style-name="Emphasis"><text:span text:style-name="T188">not n/a. </text:span></text:span></text:p>
        </text:list-item>
        <text:list-item>
          <text:p text:style-name="P73"><text:span text:style-name="Emphasis"><text:span text:style-name="T181">'</text:span></text:span><text:span text:style-name="Emphasis"><text:span text:style-name="T187">state</text:span></text:span><text:span text:style-name="Emphasis"><text:span text:style-name="T189">: up' </text:span></text:span><text:span text:style-name="Emphasis"><text:span text:style-name="T188">not</text:span></text:span><text:span text:style-name="Emphasis"><text:span text:style-name="T181"> </text:span></text:span><text:span text:style-name="Emphasis"><text:span text:style-name="T189">'down'.</text:span></text:span></text:p>
        </text:list-item>
        <text:list-item>
          <text:p text:style-name="P73"><draw:frame draw:style-name="fr7" draw:name="Image4" text:anchor-type="paragraph" svg:y="-0.05in" svg:width="2in" svg:height="0.6098in" draw:z-index="8"><draw:image xlink:href="Pictures/1000000100000146000000644B8E0875.png" xlink:type="simple" xlink:show="embed" xlink:actuate="onLoad" draw:mime-type="image/png"/></draw:frame><text:span text:style-name="Emphasis"><text:span text:style-name="T190">Rfk-block</text:span></text:span><text:span text:style-name="Emphasis"><text:span text:style-name="T191"> – either a hardware or a software block will stop </text:span></text:span><text:span text:style-name="Emphasis"><text:span text:style-name="T192">a </text:span></text:span><text:span text:style-name="Emphasis"><text:span text:style-name="T191">connection. Software - o</text:span></text:span><text:span text:style-name="Emphasis"><text:span text:style-name="T192">ld</text:span></text:span><text:span text:style-name="Emphasis"><text:span text:style-name="T191">e</text:span></text:span><text:span text:style-name="Emphasis"><text:span text:style-name="T192">r</text:span></text:span><text:span text:style-name="Emphasis"><text:span text:style-name="T191"> versions of Blueman have a on/off slider in the</text:span></text:span><text:span text:style-name="Emphasis"><text:span text:style-name="T193">ir</text:span></text:span><text:span text:style-name="Emphasis"><text:span text:style-name="T191"> </text:span></text:span><text:span text:style-name="Emphasis"><text:span text:style-name="T193">header. See</text:span></text:span><text:span text:style-name="Emphasis"><text:span text:style-name="T191"> '</text:span></text:span><text:span text:style-name="Emphasis"><text:span text:style-name="T194"></text:span></text:span><text:span text:style-name="Emphasis"><text:span text:style-name="T195"> </text:span></text:span><text:span text:style-name="Emphasis"><text:span text:style-name="T180">on' state at </text:span></text:span><text:span text:style-name="Emphasis"><text:span text:style-name="T191">right. Hardware are most likely a PC firmware setting.</text:span></text:span></text:p>
        </text:list-item>
      </text:list>
      <text:p text:style-name="P74"><text:span text:style-name="Emphasis"><text:span text:style-name="T196"/></text:span></text:p>
      <text:p text:style-name="P75"><text:span text:style-name="T197">Verify in </text:span><text:span text:style-name="T198">the </text:span><text:span text:style-name="T197">MX </text:span><text:span text:style-name="T199">Linux </text:span><text:span text:style-name="T197">Package Installer that you have the following installed </text:span><text:span text:style-name="T200">(blue check)</text:span><text:span text:style-name="T142">:</text:span></text:p>
      <text:p text:style-name="P76"/>
      <text:p text:style-name="P77"><text:span text:style-name="T142">blueman, bluetooth, bluez, bluez-cups, bluez-firmware, firmware-iwlwifi, bluez-tools, python3-bluez, python3-ga</text:span><text:span text:style-name="T201">t</text:span><text:span text:style-name="T142">tlib, </text:span><text:span text:style-name="T202">libbluetooth3</text:span><text:span text:style-name="T142"> </text:span><text:span text:style-name="T203">and bluez-hcidump</text:span><text:span text:style-name="T142">.</text:span></text:p>
      <text:p text:style-name="P78"/>
      <text:p text:style-name="P77"><text:span text:style-name="T204">If using PipeWire (check with pactl info), add pipewire-pulse and wireplumber. For MX </text:span><text:span text:style-name="T205">Linux 21 </text:span><text:span text:style-name="T206">ONLY</text:span><text:span text:style-name="T205">- </text:span><text:span text:style-name="T204">'</text:span><text:span text:style-name="Emphasis"><text:span text:style-name="T207">pulseaudio-module-bluetooth'.</text:span></text:span></text:p>
      <text:p text:style-name="P79"/>
      <text:p text:style-name="P80"><text:soft-page-break/><text:span text:style-name="T141">The file '</text:span>bluez-obexd' <text:span text:style-name="T141">is optional</text:span><text:span text:style-name="T143"> - Object Exchange daemon for sharing content </text:span><text:span text:style-name="T141">(file transfer)</text:span><text:span text:style-name="T143">.</text:span></text:p>
      <text:p text:style-name="P80"/>
      <text:p text:style-name="Standard"><text:span text:style-name="T124">Use: </text:span><text:span text:style-name="T131">sudo apt install –reinstall [list of package</text:span><text:span text:style-name="T208">s]</text:span></text:p>
      <text:p text:style-name="P81"/>
      <text:p text:style-name="P82"><text:span text:style-name="T31">Older Laptops</text:span> – <text:span text:style-name="T157">Use TLP to turn off power saving. I</text:span><text:span text:style-name="T26">nstall </text:span><text:span text:style-name="T209">three</text:span><text:span text:style-name="T26"> additional packages: </text:span><text:span text:style-name="T210">tlp, </text:span><text:span text:style-name="T211">tlp-r</text:span><text:span text:style-name="T212">d</text:span><text:span text:style-name="T211">w, tlpui</text:span><text:span text:style-name="T26">. </text:span><text:span text:style-name="T209">O</text:span><text:span text:style-name="T157">nce TLP is <text:s/>installed on</text:span><text:span text:style-name="T209"> the Start menu click</text:span><text:span text:style-name="T213"> </text:span><text:span text:style-name="T214">TLP UI</text:span><text:span text:style-name="T213"> </text:span><text:span text:style-name="T215">and s</text:span><text:span text:style-name="T209">elect </text:span><text:span text:style-name="T213">'Configuration' </text:span><text:span text:style-name="T209">tab item</text:span><text:span text:style-name="T213"> 'USB'. </text:span><text:span text:style-name="T209">In </text:span><text:span text:style-name="T213">'USB_EXCLUDE_BTUSB' toggle it </text:span><text:span text:style-name="T209">to</text:span><text:span text:style-name="T213"> '</text:span><text:span text:style-name="T209">ON' (</text:span><text:span text:style-name="T143">turns blue</text:span><text:span text:style-name="T209">)</text:span><text:span text:style-name="T213">. Click 'Save' </text:span><text:span text:style-name="T209">in the upper right</text:span><text:span text:style-name="T213">.</text:span></text:p>
      <text:p text:style-name="P83"/>
      <text:p text:style-name="P84"><text:span text:style-name="T216">D</text:span>ual <text:span text:style-name="T216">B</text:span>ooting</text:p>
      <text:p text:style-name="Text_20_body">For <text:span text:style-name="T217">d</text:span>ual <text:span text:style-name="T217">b</text:span>ooting <text:span text:style-name="T55">multiple </text:span>Linux’s ensure <text:span text:style-name="T55">that </text:span>all files from <text:span text:style-name="T218">/var/lib/bluetooth/BT-Adapter-MAC-address</text:span> are identical on each installation. Some <text:span text:style-name="T55">B</text:span><text:span text:style-name="T217">luetooth</text:span><text:span text:style-name="T55"> </text:span>devices can not handle multiple pairings associated with <text:span text:style-name="T217">the same</text:span> MAC address. <text:span text:style-name="T219">More - </text:span><text:a xlink:type="simple" xlink:href="https://wiki.archlinux.org/title/Bluetooth#Dual_boot_pairing" text:style-name="Internet_20_link" text:visited-style-name="Visited_20_Internet_20_Link"><text:span text:style-name="T219">https://wiki.archlinux.org/title/Bluetooth#Dual_boot_pairing</text:span></text:a></text:p>
      <text:p text:style-name="P85"/>
      <text:p text:style-name="P86">Computer is not visible</text:p>
      <text:p text:style-name="Text_20_body"><text:span text:style-name="T33">I</text:span><text:span text:style-name="T220">f</text:span> your <text:span text:style-name="T220">PC</text:span> <text:span text:style-name="T220">is</text:span> not 'discovered' from your phone. <text:span text:style-name="T221">Xfce</text:span><text:span text:style-name="T222">: </text:span><text:span text:style-name="T33">this setting is in 'Bluetooth Adapters'.</text:span><text:span text:style-name="T222"> </text:span>Enable '<text:span text:style-name="T1">Always visible</text:span>' <text:span text:style-name="T1">in Visibility settings</text:span>. <text:span text:style-name="T221">KDE</text:span><text:span text:style-name="T222">: </text:span><text:span text:style-name="T223">in etc/bluetooth/main.conf set to stay discoverable forever.</text:span></text:p>
      <text:p text:style-name="Text_20_body"><text:span text:style-name="T224">Laptops</text:span><text:span text:style-name="T225">: </text:span>With Intel <text:span text:style-name="T4">Centrino </text:span>dual function Wi-Fi/Bluetooth adapters <text:span text:style-name="T160">see</text:span><text:span text:style-name="T226">n </text:span>in o<text:span text:style-name="T4">ld</text:span>e<text:span text:style-name="T4">r</text:span> laptops, there exists a <text:span text:style-name="T215">prerequisite</text:span>. <text:span text:style-name="T226">T</text:span>he Wi-Fi <text:span text:style-name="T32">adapter </text:span><text:span text:style-name="T227">MUST</text:span> be on/enabled BEFORE turning on the Bluetooth. For most, this c<text:span text:style-name="T226">a</text:span>n be done by turning OFF the Airplane Mode (F-key with a<text:span text:style-name="T228">n</text:span> <text:span text:style-name="T228">air</text:span>plane <text:span text:style-name="T229"></text:span><text:span text:style-name="T230"> or a radio tower </text:span><text:span text:style-name="T229"></text:span><text:span text:style-name="T230"> on it</text:span>). More <text:a xlink:type="simple" xlink:href="https://wiki.archlinux.org/title/Wireless_network_configuration#Bluetooth_coexistence" text:style-name="Internet_20_link" text:visited-style-name="Visited_20_Internet_20_Link">here</text:a>.</text:p>
      <text:p text:style-name="Standard"/>
      <text:h text:style-name="Heading_20_3" text:outline-level="3">Links</text:h>
      <text:p text:style-name="P87"/>
      <text:p text:style-name="P88"><text:span text:style-name="T31">MX </text:span><text:span text:style-name="T231">Linux </text:span><text:span text:style-name="T31">Wiki</text:span> - <text:a xlink:type="simple" xlink:href="https://mxlinux.org/wiki/networking/bluetooth/" text:style-name="Internet_20_link" text:visited-style-name="Visited_20_Internet_20_Link">Bluetooth</text:a></text:p>
      <text:p text:style-name="Standard"/>
      <text:p text:style-name="P89"><text:span text:style-name="T31">TLP</text:span> - Optimize Linux Laptop Battery Life - <text:a xlink:type="simple" xlink:href="https://linrunner.de/tlp/index.html" text:style-name="Internet_20_link" text:visited-style-name="Visited_20_Internet_20_Link">https://linrunner.de/tlp/index.html</text:a></text:p>
      <text:p text:style-name="P90">“...TLP is a feature-rich command line <text:span text:style-name="T232">[and GUI]</text:span> utility for Linux, saving laptop battery power without the need to delve deeper into technical details….” <text:span text:style-name="T156">TLP n</text:span><text:span text:style-name="T161">ow covers all laptops, not just ThinkPads.</text:span></text:p>
      <text:p text:style-name="Standard"/>
      <text:p text:style-name="P91"><text:span text:style-name="T233">Wikipedia</text:span><text:span text:style-name="T234"> - </text:span><text:a xlink:type="simple" xlink:href="https://en.wikipedia.org/wiki/List_of_Bluetooth_profiles" text:style-name="Internet_20_link" text:visited-style-name="Visited_20_Internet_20_Link"><text:span text:style-name="T234">List of Bluetooth profiles</text:span>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2"><text:span text:style-name="T235">Please direct ALL support requests to the MX Linux Forum</text:span><text:span text:style-name="T236"> <text:s/>-- <text:s/></text:span><text:a xlink:type="simple" xlink:href="https://forum.mxlinux.org/" text:style-name="Internet_20_link" text:visited-style-name="Visited_20_Internet_20_Link"><text:span text:style-name="T236">https://forum.mxlinux.org/</text:span></text:a></text:p>
      <text:p text:style-name="P93"><text:span text:style-name="T237">Created by: </text:span><text:a xlink:type="simple" xlink:href="https://fullscale4me.com/" text:style-name="Internet_20_link" text:visited-style-name="Visited_20_Internet_20_Link"><text:span text:style-name="T238">FullScale4Me</text:span></text:a><text:span text:style-name="T237"> </text:span><text:span text:style-name="T238">on</text:span>: <text:span text:style-name="T239">October </text:span>3, 2024<text:tab/><text:tab/><text:tab/><text:tab/><text:tab/> <text:s text:c="4"/><text:span text:style-name="T31">Updated</text:span>: <text:span text:style-name="T175">May</text:span><text:span text:style-name="T240"> </text:span><text:span text:style-name="T241">1</text:span><text:span text:style-name="T175">1</text:span><text:span text:style-name="T242">, 202</text:span><text:span text:style-name="T165">6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fo:background-color="#cccccc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WenQuanYi Micro Hei" style:font-family-asian="'WenQuanYi Micro Hei'" style:font-family-generic-asian="system" style:font-pitch-asian="variable" style:font-size-asian="7pt" style:font-weight-asian="bold" style:font-name-complex="Noto Sans1" style:font-family-complex="'Noto Sans'" style:font-family-generic-complex="system" style:font-pitch-complex="variable" style:font-size-complex="7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603090" loext:opacity="100%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6pt" style:font-size-asian="5.25pt" style:font-size-complex="6pt"/>
    </style:style>
    <style:page-layout style:name="Mpm1">
      <style:page-layout-properties fo:page-width="8.5in" fo:page-height="11in" style:num-format="1" style:print-orientation="portrait" fo:margin-top="0.25in" fo:margin-bottom="0.2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ke O'Toole</meta:initial-creator>
    <meta:creation-date>2024-10-03T00:04:40.396573029</meta:creation-date>
    <dc:date>2026-05-11T17:10:29.945512074</dc:date>
    <dc:creator>Mike OToole</dc:creator>
    <meta:editing-duration>P1DT8H50M9S</meta:editing-duration>
    <meta:editing-cycles>241</meta:editing-cycles>
    <meta:generator>LibreOffice/26.2.3.2$Linux_X86_64 LibreOffice_project/620$Build-2</meta:generator>
    <meta:printed-by>PDF files: Mike O'Toole</meta:printed-by>
    <meta:print-date>2026-04-10T22:00:23.543128946</meta:print-date>
    <dc:title>Bluetooth devices – How To</dc:title>
    <meta:document-statistic meta:table-count="0" meta:image-count="10" meta:object-count="0" meta:page-count="5" meta:paragraph-count="104" meta:word-count="1709" meta:character-count="10561" meta:non-whitespace-character-count="8959"/>
  </office:meta>
</office:document-meta>
</file>